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58000002582A4566DB.jpg" manifest:media-type="image/jpeg"/>
  <manifest:file-entry manifest:full-path="Pictures/1000000000000738000002B0E4F6E82D.png" manifest:media-type="image/png"/>
  <manifest:file-entry manifest:full-path="Pictures/1000000000000590000001FC387FCD29.png" manifest:media-type="image/png"/>
  <manifest:file-entry manifest:full-path="Pictures/10000001000001EF000001DB426CA74C.png" manifest:media-type="image/png"/>
  <manifest:file-entry manifest:full-path="Pictures/100000010000040D00000334ACEA8EA1.png" manifest:media-type="image/png"/>
  <manifest:file-entry manifest:full-path="Pictures/100000010000002500000027932E273A.png" manifest:media-type="image/png"/>
  <manifest:file-entry manifest:full-path="Pictures/10000001000001F600000071891220AF.png" manifest:media-type="image/png"/>
  <manifest:file-entry manifest:full-path="Pictures/1000000100000374000001F840067AA2.png" manifest:media-type="image/png"/>
  <manifest:file-entry manifest:full-path="Pictures/10000001000001B90000010D14F222A4.png" manifest:media-type="image/png"/>
  <manifest:file-entry manifest:full-path="Pictures/100000010000041C0000020DB2DE1113.png" manifest:media-type="image/png"/>
  <manifest:file-entry manifest:full-path="Pictures/100000010000020800000231AE868926.png" manifest:media-type="image/png"/>
  <manifest:file-entry manifest:full-path="Pictures/10000000000001F200000107059D3CDE.png" manifest:media-type="image/png"/>
  <manifest:file-entry manifest:full-path="Pictures/10000001000002B2000002AD06E8DFC7.png" manifest:media-type="image/png"/>
  <manifest:file-entry manifest:full-path="Pictures/1000000100000112000001605E104E76.png" manifest:media-type="image/png"/>
  <manifest:file-entry manifest:full-path="Pictures/100000010000032400000164540B4EB8.png" manifest:media-type="image/png"/>
  <manifest:file-entry manifest:full-path="Pictures/100000010000030400000051882C9D17.png" manifest:media-type="image/png"/>
  <manifest:file-entry manifest:full-path="Pictures/100000010000027F000002956E85D488.png" manifest:media-type="image/png"/>
  <manifest:file-entry manifest:full-path="Pictures/100000010000028C000003E6301F80B7.png" manifest:media-type="image/png"/>
  <manifest:file-entry manifest:full-path="Pictures/100000010000077A000001E420213F5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Trebuchet MS', Verdana, Helvetica, Arial, sans-serif"/>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38e4f" officeooo:paragraph-rsid="00038e4f"/>
    </style:style>
    <style:style style:name="P2" style:family="paragraph" style:parent-style-name="Standard">
      <style:paragraph-properties fo:text-align="center" style:justify-single-word="false"/>
      <style:text-properties fo:font-size="18pt" fo:font-weight="bold" officeooo:rsid="00038e4f" officeooo:paragraph-rsid="00038e4f"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5pt" officeooo:rsid="00038e4f" officeooo:paragraph-rsid="00038e4f" style:font-size-asian="15pt" style:font-size-complex="15pt"/>
    </style:style>
    <style:style style:name="P4" style:family="paragraph" style:parent-style-name="Standard">
      <style:paragraph-properties fo:text-align="center" style:justify-single-word="false"/>
      <style:text-properties fo:font-size="8pt" officeooo:rsid="0005a12f" officeooo:paragraph-rsid="0005a12f" style:font-size-asian="8pt" style:font-size-complex="8pt"/>
    </style:style>
    <style:style style:name="P5" style:family="paragraph" style:parent-style-name="Standard">
      <style:text-properties officeooo:rsid="00038e4f" officeooo:paragraph-rsid="00038e4f"/>
    </style:style>
    <style:style style:name="P6" style:family="paragraph" style:parent-style-name="Standard">
      <style:text-properties officeooo:rsid="002c12e1" officeooo:paragraph-rsid="002c12e1"/>
    </style:style>
    <style:style style:name="P7" style:family="paragraph" style:parent-style-name="Standard">
      <style:text-properties fo:font-style="italic" fo:font-weight="bold" officeooo:rsid="001aac56" officeooo:paragraph-rsid="001aac56" style:font-style-asian="italic" style:font-weight-asian="bold" style:font-style-complex="italic" style:font-weight-complex="bold"/>
    </style:style>
    <style:style style:name="P8" style:family="paragraph" style:parent-style-name="Standard">
      <style:text-properties fo:font-size="20pt" fo:font-weight="bold" officeooo:rsid="00ed206d" officeooo:paragraph-rsid="00ed206d" style:font-size-asian="20pt" style:font-weight-asian="bold" style:font-size-complex="20pt" style:font-weight-complex="bold"/>
    </style:style>
    <style:style style:name="P9" style:family="paragraph" style:parent-style-name="Standard">
      <style:text-properties fo:font-size="12pt" fo:font-weight="normal" officeooo:rsid="00ed206d" officeooo:paragraph-rsid="00ed206d" style:font-size-asian="10.5pt" style:font-weight-asian="normal" style:font-size-complex="12pt" style:font-weight-complex="normal"/>
    </style:style>
    <style:style style:name="P10" style:family="paragraph" style:parent-style-name="Standard">
      <style:text-properties fo:font-size="20pt" fo:font-weight="bold" officeooo:rsid="00d29fbf" officeooo:paragraph-rsid="00d29fbf" style:font-size-asian="20pt" style:font-weight-asian="bold" style:font-size-complex="20pt" style:font-weight-complex="bold"/>
    </style:style>
    <style:style style:name="P11" style:family="paragraph" style:parent-style-name="Standard">
      <style:text-properties fo:font-size="12pt" fo:font-weight="bold" officeooo:rsid="00d29fbf" officeooo:paragraph-rsid="00d29fbf" style:font-size-asian="10.5pt" style:font-weight-asian="bold" style:font-size-complex="12pt" style:font-weight-complex="bold"/>
    </style:style>
    <style:style style:name="P12" style:family="paragraph" style:parent-style-name="Standard">
      <style:text-properties fo:font-size="12pt" fo:font-weight="normal" officeooo:rsid="00d29fbf" officeooo:paragraph-rsid="00d29fbf" style:font-size-asian="10.5pt" style:font-weight-asian="normal" style:font-size-complex="12pt" style:font-weight-complex="normal"/>
    </style:style>
    <style:style style:name="P13" style:family="paragraph" style:parent-style-name="Standard">
      <style:text-properties fo:font-size="20pt" fo:font-weight="bold" officeooo:rsid="00089f93" officeooo:paragraph-rsid="00089f93" style:font-size-asian="20pt" style:font-weight-asian="bold" style:font-size-complex="20pt" style:font-weight-complex="bold"/>
    </style:style>
    <style:style style:name="P14" style:family="paragraph" style:parent-style-name="Standard">
      <style:text-properties fo:font-size="16pt" fo:font-weight="bold" officeooo:rsid="00089f93" officeooo:paragraph-rsid="00089f93" style:font-size-asian="16pt" style:font-weight-asian="bold" style:font-size-complex="16pt" style:font-weight-complex="bold"/>
    </style:style>
    <style:style style:name="P15" style:family="paragraph" style:parent-style-name="Standard">
      <style:text-properties fo:font-size="16pt" fo:font-weight="bold" officeooo:rsid="0009abaa" officeooo:paragraph-rsid="0009abaa" style:font-size-asian="16pt" style:font-weight-asian="bold" style:font-size-complex="16pt" style:font-weight-complex="bold"/>
    </style:style>
    <style:style style:name="P16" style:family="paragraph" style:parent-style-name="Standard">
      <style:text-properties fo:font-size="12pt" fo:font-weight="normal" officeooo:rsid="00089f93" officeooo:paragraph-rsid="00089f93" style:font-size-asian="10.5pt" style:font-weight-asian="normal" style:font-size-complex="12pt" style:font-weight-complex="normal"/>
    </style:style>
    <style:style style:name="P17" style:family="paragraph" style:parent-style-name="Standard">
      <style:text-properties fo:font-size="12pt" fo:font-style="normal" fo:font-weight="normal" officeooo:rsid="001a028a" officeooo:paragraph-rsid="00089f93"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fo:font-weight="normal" officeooo:rsid="003e88f1" officeooo:paragraph-rsid="003fc0bc"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fo:font-weight="normal" officeooo:rsid="003e88f1" officeooo:paragraph-rsid="003e88f1" style:font-size-asian="10.5pt" style:font-style-asian="normal" style:font-weight-asian="normal" style:font-size-complex="12pt" style:font-style-complex="normal" style:font-weight-complex="normal"/>
    </style:style>
    <style:style style:name="P20" style:family="paragraph" style:parent-style-name="Standard">
      <style:text-properties fo:font-size="16pt" fo:font-style="normal" fo:font-weight="bold" officeooo:rsid="004e9286" officeooo:paragraph-rsid="004e9286" style:font-size-asian="16pt" style:font-style-asian="normal" style:font-weight-asian="bold" style:font-size-complex="16pt" style:font-style-complex="normal" style:font-weight-complex="bold"/>
    </style:style>
    <style:style style:name="P21" style:family="paragraph" style:parent-style-name="Standard">
      <style:text-properties fo:font-size="12pt" fo:font-style="normal" fo:font-weight="normal" officeooo:rsid="0009abaa" officeooo:paragraph-rsid="0009abaa" style:font-size-asian="10.5pt" style:font-style-asian="normal" style:font-weight-asian="normal" style:font-size-complex="12pt" style:font-style-complex="normal" style:font-weight-complex="normal"/>
    </style:style>
    <style:style style:name="P22" style:family="paragraph" style:parent-style-name="Standard">
      <style:text-properties fo:font-size="16pt" fo:font-style="normal" fo:font-weight="bold" officeooo:rsid="000b3d2f" officeooo:paragraph-rsid="00da5072" style:font-size-asian="16pt" style:font-style-asian="normal" style:font-weight-asian="bold" style:font-size-complex="16pt" style:font-style-complex="normal" style:font-weight-complex="bold"/>
    </style:style>
    <style:style style:name="P23" style:family="paragraph" style:parent-style-name="Standard">
      <style:text-properties fo:font-size="12pt" fo:font-style="normal" fo:font-weight="normal" officeooo:rsid="009c111a" officeooo:paragraph-rsid="009c111a" style:font-size-asian="10.5pt" style:font-style-asian="normal" style:font-weight-asian="normal" style:font-size-complex="12pt" style:font-style-complex="normal" style:font-weight-complex="normal"/>
    </style:style>
    <style:style style:name="P24" style:family="paragraph" style:parent-style-name="Standard">
      <style:text-properties fo:font-size="16pt" fo:font-style="normal" fo:font-weight="bold" officeooo:rsid="000b3d2f" officeooo:paragraph-rsid="009c111a" style:font-size-asian="16pt" style:font-style-asian="normal" style:font-weight-asian="bold" style:font-size-complex="16pt" style:font-style-complex="normal" style:font-weight-complex="bold"/>
    </style:style>
    <style:style style:name="P25" style:family="paragraph" style:parent-style-name="Standard">
      <style:text-properties fo:font-size="12pt" fo:font-style="italic" fo:font-weight="normal" officeooo:rsid="003834aa" officeooo:paragraph-rsid="00580829" style:font-size-asian="10.5pt" style:font-style-asian="italic" style:font-weight-asian="normal" style:font-size-complex="12pt" style:font-style-complex="italic" style:font-weight-complex="normal"/>
    </style:style>
    <style:style style:name="P26" style:family="paragraph" style:parent-style-name="Standard">
      <style:text-properties fo:font-size="12pt" fo:font-style="normal" fo:font-weight="normal" officeooo:rsid="003834aa" officeooo:paragraph-rsid="00580829" style:font-size-asian="10.5pt" style:font-style-asian="normal" style:font-weight-asian="normal" style:font-size-complex="12pt" style:font-style-complex="normal" style:font-weight-complex="normal"/>
    </style:style>
    <style:style style:name="P27" style:family="paragraph" style:parent-style-name="Standard">
      <style:text-properties fo:font-size="16pt" fo:font-style="normal" fo:font-weight="bold" officeooo:rsid="004e9286" officeooo:paragraph-rsid="00ba5d58" style:font-size-asian="16pt" style:font-style-asian="normal" style:font-weight-asian="bold" style:font-size-complex="16pt" style:font-style-complex="normal" style:font-weight-complex="bold"/>
    </style:style>
    <style:style style:name="P28" style:family="paragraph" style:parent-style-name="Standard">
      <style:text-properties fo:font-size="16pt" fo:font-style="normal" fo:font-weight="bold" officeooo:rsid="0009abaa" officeooo:paragraph-rsid="00ba5d58" style:font-size-asian="16pt" style:font-style-asian="normal" style:font-weight-asian="bold" style:font-size-complex="16pt" style:font-style-complex="normal" style:font-weight-complex="bold"/>
    </style:style>
    <style:style style:name="P29" style:family="paragraph" style:parent-style-name="Standard">
      <style:text-properties fo:font-size="12pt" fo:font-style="normal" fo:font-weight="normal" officeooo:rsid="0009abaa" officeooo:paragraph-rsid="00ba5d58" style:font-size-asian="12pt" style:font-style-asian="normal" style:font-weight-asian="normal" style:font-size-complex="12pt" style:font-style-complex="normal" style:font-weight-complex="normal"/>
    </style:style>
    <style:style style:name="P30" style:family="paragraph" style:parent-style-name="Standard">
      <style:text-properties officeooo:paragraph-rsid="00ba5d58"/>
    </style:style>
    <style:style style:name="P31" style:family="paragraph" style:parent-style-name="Standard">
      <style:text-properties fo:font-size="12pt" fo:font-style="normal" fo:font-weight="normal" officeooo:rsid="000b3d2f" officeooo:paragraph-rsid="00ba5d58" style:font-size-asian="12pt" style:font-style-asian="normal" style:font-weight-asian="normal" style:font-size-complex="12pt" style:font-style-complex="normal" style:font-weight-complex="normal"/>
    </style:style>
    <style:style style:name="P32" style:family="paragraph" style:parent-style-name="Standard">
      <style:text-properties fo:font-size="12pt" fo:font-style="normal" fo:font-weight="normal" officeooo:rsid="000cb19f" officeooo:paragraph-rsid="00baa02f" style:font-size-asian="12pt" style:font-style-asian="normal" style:font-weight-asian="normal" style:font-size-complex="12pt" style:font-style-complex="normal" style:font-weight-complex="normal"/>
    </style:style>
    <style:style style:name="P33" style:family="paragraph" style:parent-style-name="Standard">
      <style:text-properties fo:font-size="12pt" fo:font-style="normal" fo:font-weight="normal" officeooo:rsid="000f1254" officeooo:paragraph-rsid="00baa02f" style:font-size-asian="12pt" style:font-style-asian="normal" style:font-weight-asian="normal" style:font-size-complex="12pt" style:font-style-complex="normal" style:font-weight-complex="normal"/>
    </style:style>
    <style:style style:name="P34" style:family="paragraph" style:parent-style-name="Standard">
      <style:text-properties fo:font-size="12pt" fo:font-style="normal" fo:font-weight="normal" officeooo:rsid="00228e66" officeooo:paragraph-rsid="00baa02f" style:font-size-asian="12pt" style:font-style-asian="normal" style:font-weight-asian="normal" style:font-size-complex="12pt" style:font-style-complex="normal" style:font-weight-complex="normal"/>
    </style:style>
    <style:style style:name="P35" style:family="paragraph" style:parent-style-name="Standard">
      <style:text-properties officeooo:rsid="000cb19f" officeooo:paragraph-rsid="00580829"/>
    </style:style>
    <style:style style:name="P36" style:family="paragraph" style:parent-style-name="Text_20_body">
      <style:text-properties officeooo:rsid="000cb19f"/>
    </style:style>
    <style:style style:name="P37" style:family="paragraph" style:parent-style-name="Standard">
      <style:text-properties fo:font-size="12pt" fo:font-style="normal" fo:font-weight="normal" officeooo:rsid="001d730f" officeooo:paragraph-rsid="00ba5d58" style:font-size-asian="12pt" style:font-style-asian="normal" style:font-weight-asian="normal" style:font-size-complex="12pt" style:font-style-complex="normal" style:font-weight-complex="normal"/>
    </style:style>
    <style:style style:name="P38" style:family="paragraph" style:parent-style-name="Standard">
      <style:text-properties fo:font-size="12pt" fo:font-style="normal" fo:font-weight="normal" officeooo:rsid="000b3d2f" officeooo:paragraph-rsid="000b3d2f" style:font-size-asian="12pt" style:font-style-asian="normal" style:font-weight-asian="normal" style:font-size-complex="12pt" style:font-style-complex="normal" style:font-weight-complex="normal"/>
    </style:style>
    <style:style style:name="P39" style:family="paragraph" style:parent-style-name="Standard">
      <style:text-properties fo:font-size="16pt" fo:font-style="normal" fo:font-weight="bold" officeooo:rsid="00377fae" officeooo:paragraph-rsid="00377fae" style:font-size-asian="16pt" style:font-style-asian="normal" style:font-weight-asian="bold" style:font-size-complex="16pt" style:font-style-complex="normal" style:font-weight-complex="bold"/>
    </style:style>
    <style:style style:name="P40" style:family="paragraph" style:parent-style-name="Standard">
      <style:text-properties fo:font-size="12pt" fo:font-style="normal" fo:font-weight="normal" officeooo:rsid="00377fae" officeooo:paragraph-rsid="00377fae" style:font-size-asian="10.5pt" style:font-style-asian="normal" style:font-weight-asian="normal" style:font-size-complex="12pt" style:font-style-complex="normal" style:font-weight-complex="normal"/>
    </style:style>
    <style:style style:name="P41" style:family="paragraph" style:parent-style-name="Standard">
      <style:text-properties fo:font-size="20pt" fo:font-style="normal" fo:font-weight="bold" officeooo:rsid="0082e301" officeooo:paragraph-rsid="0082e301" style:font-size-asian="20pt" style:font-style-asian="normal" style:font-weight-asian="bold" style:font-size-complex="20pt" style:font-style-complex="normal" style:font-weight-complex="bold"/>
    </style:style>
    <style:style style:name="P42" style:family="paragraph" style:parent-style-name="Standard">
      <style:text-properties fo:font-size="16pt" fo:font-style="normal" fo:font-weight="bold" officeooo:rsid="0082e301" officeooo:paragraph-rsid="0082e301" style:font-size-asian="16pt" style:font-style-asian="normal" style:font-weight-asian="bold" style:font-size-complex="16pt" style:font-style-complex="normal" style:font-weight-complex="bold"/>
    </style:style>
    <style:style style:name="P43" style:family="paragraph" style:parent-style-name="Standard">
      <style:text-properties fo:font-size="12pt" fo:font-style="normal" fo:font-weight="bold" officeooo:rsid="0082e301" officeooo:paragraph-rsid="0082e301" style:font-size-asian="10.5pt" style:font-style-asian="normal" style:font-weight-asian="bold" style:font-size-complex="12pt" style:font-style-complex="normal" style:font-weight-complex="bold"/>
    </style:style>
    <style:style style:name="P44" style:family="paragraph" style:parent-style-name="Standard">
      <style:text-properties fo:font-size="12pt" fo:font-style="normal" fo:font-weight="normal" officeooo:rsid="0082e301" officeooo:paragraph-rsid="0082e301" style:font-size-asian="12pt" style:font-style-asian="normal" style:font-weight-asian="normal" style:font-size-complex="12pt" style:font-style-complex="normal" style:font-weight-complex="normal"/>
    </style:style>
    <style:style style:name="P45" style:family="paragraph" style:parent-style-name="Heading_20_2">
      <style:text-properties fo:font-size="12pt" fo:font-style="normal" fo:font-weight="normal" officeooo:rsid="00377fae" officeooo:paragraph-rsid="00377fae"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fo:font-weight="normal" officeooo:rsid="00762823" officeooo:paragraph-rsid="00779e6b" style:font-size-asian="10.5pt" style:font-style-asian="normal" style:font-weight-asian="normal" style:font-size-complex="12pt" style:font-style-complex="normal" style:font-weight-complex="normal"/>
    </style:style>
    <style:style style:name="P47" style:family="paragraph" style:parent-style-name="Text_20_body">
      <style:text-properties officeooo:rsid="00377fae"/>
    </style:style>
    <style:style style:name="P48" style:family="paragraph" style:parent-style-name="Heading_20_3">
      <style:text-properties fo:font-size="12pt" fo:font-weight="normal" officeooo:rsid="00377fae" style:font-size-asian="10.5pt" style:font-weight-asian="normal" style:font-size-complex="12pt" style:font-weight-complex="normal"/>
    </style:style>
    <style:style style:name="P49" style:family="paragraph" style:parent-style-name="Text_20_body" style:list-style-name="L1">
      <style:text-properties officeooo:rsid="00377fae"/>
    </style:style>
    <style:style style:name="P50" style:family="paragraph" style:parent-style-name="Text_20_body" style:list-style-name="L2">
      <style:text-properties officeooo:rsid="00377fae"/>
    </style:style>
    <style:style style:name="P51" style:family="paragraph" style:parent-style-name="Text_20_body" style:list-style-name="L3">
      <style:text-properties officeooo:rsid="00377fae"/>
    </style:style>
    <style:style style:name="P52" style:family="paragraph" style:parent-style-name="Text_20_body" style:list-style-name="L4">
      <style:text-properties officeooo:rsid="00377fae"/>
    </style:style>
    <style:style style:name="P53" style:family="paragraph" style:parent-style-name="Quotations">
      <style:text-properties officeooo:rsid="00377fae"/>
    </style:style>
    <style:style style:name="P54" style:family="paragraph" style:parent-style-name="Standard">
      <style:text-properties fo:font-size="12pt" fo:font-style="normal" fo:font-weight="normal" officeooo:rsid="00762823" officeooo:paragraph-rsid="00762823" style:font-size-asian="10.5pt" style:font-style-asian="normal" style:font-weight-asian="normal" style:font-size-complex="12pt" style:font-style-complex="normal" style:font-weight-complex="normal"/>
    </style:style>
    <style:style style:name="P55" style:family="paragraph" style:parent-style-name="Standard">
      <style:text-properties fo:font-size="16pt" fo:font-style="normal" fo:font-weight="bold" officeooo:rsid="0079a299" officeooo:paragraph-rsid="0079a299" style:font-size-asian="16pt" style:font-style-asian="normal" style:font-weight-asian="bold" style:font-size-complex="16pt" style:font-style-complex="normal" style:font-weight-complex="bold"/>
    </style:style>
    <style:style style:name="P56" style:family="paragraph" style:parent-style-name="Standard">
      <style:text-properties fo:font-size="12pt" fo:font-style="normal" fo:font-weight="bold" officeooo:rsid="0079a299" officeooo:paragraph-rsid="0079a299" style:font-size-asian="10.5pt" style:font-style-asian="normal" style:font-weight-asian="bold" style:font-size-complex="12pt" style:font-style-complex="normal" style:font-weight-complex="bold"/>
    </style:style>
    <style:style style:name="P57" style:family="paragraph" style:parent-style-name="Standard">
      <style:text-properties fo:font-size="12pt" fo:font-style="normal" fo:font-weight="normal" officeooo:rsid="0079a299" officeooo:paragraph-rsid="0079a299" style:font-size-asian="10.5pt" style:font-style-asian="normal" style:font-weight-asian="normal" style:font-size-complex="12pt" style:font-style-complex="normal" style:font-weight-complex="normal"/>
    </style:style>
    <style:style style:name="P58" style:family="paragraph" style:parent-style-name="Standard">
      <style:text-properties fo:font-size="16pt" fo:font-style="normal" fo:font-weight="bold" officeooo:rsid="007c39a7" officeooo:paragraph-rsid="0079a299" style:font-size-asian="16pt" style:font-style-asian="normal" style:font-weight-asian="bold" style:font-size-complex="16pt" style:font-style-complex="normal" style:font-weight-complex="bold"/>
    </style:style>
    <style:style style:name="P59" style:family="paragraph" style:parent-style-name="Standard">
      <style:text-properties fo:font-size="16pt" fo:font-style="normal" fo:font-weight="bold" officeooo:rsid="007c39a7" officeooo:paragraph-rsid="007c39a7" style:font-size-asian="16pt" style:font-style-asian="normal" style:font-weight-asian="bold" style:font-size-complex="16pt" style:font-style-complex="normal" style:font-weight-complex="bold"/>
    </style:style>
    <style:style style:name="P60" style:family="paragraph" style:parent-style-name="Standard">
      <style:text-properties fo:font-size="12pt" fo:font-style="normal" fo:font-weight="bold" officeooo:rsid="007c39a7" officeooo:paragraph-rsid="007c39a7" style:font-size-asian="10.5pt" style:font-style-asian="normal" style:font-weight-asian="bold" style:font-size-complex="12pt" style:font-style-complex="normal" style:font-weight-complex="bold"/>
    </style:style>
    <style:style style:name="P61" style:family="paragraph" style:parent-style-name="Standard">
      <style:text-properties fo:font-size="12pt" fo:font-style="normal" fo:font-weight="normal" officeooo:rsid="007c39a7" officeooo:paragraph-rsid="007c39a7" style:font-size-asian="10.5pt" style:font-style-asian="normal" style:font-weight-asian="normal" style:font-size-complex="12pt" style:font-style-complex="normal" style:font-weight-complex="normal"/>
    </style:style>
    <style:style style:name="P62" style:family="paragraph" style:parent-style-name="Standard">
      <style:text-properties fo:font-size="16pt" fo:font-style="normal" fo:font-weight="bold" officeooo:rsid="007c39a7" officeooo:paragraph-rsid="0081d2e8" style:font-size-asian="16pt" style:font-style-asian="normal" style:font-weight-asian="bold" style:font-size-complex="16pt" style:font-style-complex="normal" style:font-weight-complex="bold"/>
    </style:style>
    <style:style style:name="P63" style:family="paragraph" style:parent-style-name="Standard">
      <style:text-properties fo:font-size="12pt" fo:font-style="normal" fo:font-weight="normal" officeooo:rsid="007c39a7" officeooo:paragraph-rsid="0081d2e8"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079a299" officeooo:paragraph-rsid="0081d2e8" style:font-size-asian="10.5pt" style:font-style-asian="normal" style:font-weight-asian="normal" style:font-size-complex="12pt" style:font-style-complex="normal" style:font-weight-complex="normal"/>
    </style:style>
    <style:style style:name="P65" style:family="paragraph" style:parent-style-name="Standard">
      <style:text-properties fo:font-size="16pt" fo:font-style="normal" fo:font-weight="bold" officeooo:rsid="0081d2e8" officeooo:paragraph-rsid="0081d2e8" style:font-size-asian="16pt" style:font-style-asian="normal" style:font-weight-asian="bold" style:font-size-complex="16pt" style:font-style-complex="normal" style:font-weight-complex="bold"/>
    </style:style>
    <style:style style:name="P66" style:family="paragraph" style:parent-style-name="Standard">
      <style:text-properties fo:font-size="12pt" fo:font-style="normal" fo:font-weight="normal" officeooo:rsid="0081d2e8" officeooo:paragraph-rsid="0081d2e8"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082e301" officeooo:paragraph-rsid="0082e301" style:font-size-asian="10.5pt" style:font-style-asian="normal" style:font-weight-asian="normal" style:font-size-complex="12pt" style:font-style-complex="normal" style:font-weight-complex="normal"/>
    </style:style>
    <style:style style:name="P68" style:family="paragraph" style:parent-style-name="Standard">
      <style:text-properties fo:font-size="16pt" fo:font-style="normal" fo:font-weight="bold" officeooo:rsid="00580829" officeooo:paragraph-rsid="00bc113f" style:font-size-asian="16pt" style:font-style-asian="normal" style:font-weight-asian="bold" style:font-size-complex="16pt" style:font-style-complex="normal" style:font-weight-complex="bold"/>
    </style:style>
    <style:style style:name="P69" style:family="paragraph" style:parent-style-name="Standard">
      <style:text-properties fo:font-size="12pt" fo:font-style="normal" fo:font-weight="normal" officeooo:rsid="00580829" officeooo:paragraph-rsid="00bc113f"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3834aa" officeooo:paragraph-rsid="00bc113f" style:font-size-asian="10.5pt" style:font-style-asian="normal" style:font-weight-asian="normal" style:font-size-complex="12pt" style:font-style-complex="normal" style:font-weight-complex="normal"/>
    </style:style>
    <style:style style:name="P71" style:family="paragraph" style:parent-style-name="Text_20_body">
      <style:text-properties fo:font-size="12pt" fo:font-style="normal" fo:font-weight="normal" officeooo:rsid="000cb19f" officeooo:paragraph-rsid="00bc113f" style:font-size-asian="10.5pt" style:font-style-asian="normal" style:font-weight-asian="normal" style:font-size-complex="12pt" style:font-style-complex="normal" style:font-weight-complex="normal"/>
    </style:style>
    <style:style style:name="P72" style:family="paragraph">
      <loext:graphic-properties draw:opacity="0%"/>
    </style:style>
    <style:style style:name="P73" style:family="paragraph" style:parent-style-name="Text_20_body">
      <style:text-properties officeooo:rsid="000cb19f" officeooo:paragraph-rsid="00bc113f"/>
    </style:style>
    <style:style style:name="P74" style:family="paragraph" style:parent-style-name="Text_20_body">
      <style:text-properties officeooo:rsid="0067f633" officeooo:paragraph-rsid="00bc113f"/>
    </style:style>
    <style:style style:name="P75" style:family="paragraph" style:parent-style-name="Text_20_body">
      <style:text-properties officeooo:rsid="006c8656" officeooo:paragraph-rsid="00bc113f"/>
    </style:style>
    <style:style style:name="P76" style:family="paragraph" style:parent-style-name="Text_20_body">
      <style:text-properties fo:font-size="12pt" fo:font-style="normal" fo:font-weight="normal" officeooo:rsid="0081d2e8" officeooo:paragraph-rsid="00bc113f" style:font-size-asian="10.5pt" style:font-style-asian="normal" style:font-weight-asian="normal" style:font-size-complex="12pt" style:font-style-complex="normal" style:font-weight-complex="normal"/>
    </style:style>
    <style:style style:name="P77" style:family="paragraph" style:parent-style-name="Standard">
      <style:text-properties fo:font-size="16pt" fo:font-style="normal" fo:font-weight="bold" officeooo:rsid="0082e301" officeooo:paragraph-rsid="0082e301" style:font-size-asian="14pt" style:font-style-asian="normal" style:font-weight-asian="bold" style:font-size-complex="16pt" style:font-style-complex="normal" style:font-weight-complex="bold"/>
    </style:style>
    <style:style style:name="P78" style:family="paragraph" style:parent-style-name="Standard">
      <style:text-properties fo:font-variant="normal" fo:text-transform="none" fo:color="#000000" loext:opacity="100%" style:font-name="Lucida Grande" fo:font-size="9.75pt" fo:letter-spacing="normal" fo:font-style="normal" fo:font-weight="normal" officeooo:rsid="0048a47f" officeooo:paragraph-rsid="0048a47f" style:font-size-asian="10.5pt" style:font-style-asian="normal" style:font-weight-asian="normal" style:font-size-complex="12pt" style:font-style-complex="normal" style:font-weight-complex="normal"/>
    </style:style>
    <style:style style:name="P79" style:family="paragraph" style:parent-style-name="Standard">
      <style:text-properties fo:font-variant="normal" fo:text-transform="none" fo:color="#000000" loext:opacity="100%" style:font-name="Liberation Serif" fo:font-size="16pt" fo:letter-spacing="normal" fo:font-style="normal" fo:font-weight="bold" officeooo:rsid="004b4046" officeooo:paragraph-rsid="0048a47f" style:font-size-asian="16pt" style:font-weight-asian="bold" style:font-size-complex="16pt" style:font-weight-complex="bold"/>
    </style:style>
    <style:style style:name="P80" style:family="paragraph" style:parent-style-name="Standard">
      <style:text-properties fo:font-variant="normal" fo:text-transform="none" fo:color="#000000" loext:opacity="100%" style:font-name="Liberation Serif" fo:font-size="12pt" fo:letter-spacing="normal" fo:font-style="normal" fo:font-weight="normal" officeooo:rsid="004b4046" officeooo:paragraph-rsid="0048a47f" style:font-size-asian="12pt" style:font-weight-asian="bold" style:font-size-complex="12pt" style:font-weight-complex="bold"/>
    </style:style>
    <style:style style:name="P81" style:family="paragraph" style:parent-style-name="Standard">
      <style:text-properties fo:font-variant="normal" fo:text-transform="none" fo:color="#000000" loext:opacity="100%" style:font-name="Liberation Serif" fo:font-size="12pt" fo:letter-spacing="normal" fo:font-style="normal" fo:font-weight="bold" officeooo:rsid="004b4046" officeooo:paragraph-rsid="0048a47f" style:font-size-asian="12pt" style:font-weight-asian="bold" style:font-size-complex="12pt" style:font-weight-complex="bold"/>
    </style:style>
    <style:style style:name="P82" style:family="paragraph" style:parent-style-name="Standard">
      <style:text-properties fo:font-variant="normal" fo:text-transform="none" fo:color="#000000" loext:opacity="100%" style:font-name="Liberation Serif" fo:font-size="12pt" fo:letter-spacing="normal" fo:font-style="normal" fo:font-weight="normal" officeooo:rsid="004b4046" officeooo:paragraph-rsid="00fea4bd" style:font-size-asian="12pt" style:font-weight-asian="bold" style:font-size-complex="12pt" style:font-weight-complex="bold"/>
    </style:style>
    <style:style style:name="P83" style:family="paragraph" style:parent-style-name="Standard">
      <style:text-properties fo:font-variant="normal" fo:text-transform="none" fo:color="#000000" loext:opacity="100%" style:font-name="Liberation Serif" fo:font-size="12pt" fo:letter-spacing="normal" fo:font-style="normal" fo:font-weight="normal" officeooo:rsid="00fea4bd" officeooo:paragraph-rsid="00fea4bd" style:font-size-asian="12pt" style:font-weight-asian="bold" style:font-size-complex="12pt" style:font-weight-complex="bold"/>
    </style:style>
    <style:style style:name="P84"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officeooo:rsid="00377fae" officeooo:paragraph-rsid="0048a47f" style:font-size-asian="12pt" style:font-size-complex="12pt"/>
    </style:style>
    <style:style style:name="P85" style:family="paragraph" style:parent-style-name="Text_20_body">
      <style:paragraph-properties fo:margin-left="0in" fo:margin-right="0in" fo:orphans="2" fo:widows="2" fo:text-indent="0in" style:auto-text-indent="false"/>
      <style:text-properties fo:font-size="16pt" fo:font-weight="bold" officeooo:rsid="0085da97" officeooo:paragraph-rsid="0085da97" style:font-size-asian="16pt" style:font-weight-asian="bold" style:font-size-complex="16pt" style:font-weight-complex="bold"/>
    </style:style>
    <style:style style:name="P86" style:family="paragraph" style:parent-style-name="Text_20_body">
      <style:paragraph-properties fo:margin-left="0in" fo:margin-right="0in" fo:orphans="2" fo:widows="2" fo:text-indent="0in" style:auto-text-indent="false"/>
      <style:text-properties fo:font-size="12pt" fo:font-weight="normal" officeooo:rsid="0085da97" officeooo:paragraph-rsid="0085da97" style:font-size-asian="10.5pt" style:font-weight-asian="normal" style:font-size-complex="12pt" style:font-weight-complex="normal"/>
    </style:style>
    <style:style style:name="P87" style:family="paragraph" style:parent-style-name="Text_20_body">
      <style:paragraph-properties fo:margin-left="0in" fo:margin-right="0in" fo:orphans="2" fo:widows="2" fo:text-indent="0in" style:auto-text-indent="false"/>
      <style:text-properties fo:font-size="12pt" fo:font-weight="normal" officeooo:rsid="0085da97" officeooo:paragraph-rsid="00873c7e" style:font-size-asian="10.5pt" style:font-weight-asian="normal" style:font-size-complex="12pt" style:font-weight-complex="normal"/>
    </style:style>
    <style:style style:name="P88" style:family="paragraph" style:parent-style-name="Text_20_body">
      <style:paragraph-properties fo:margin-left="0in" fo:margin-right="0in" fo:orphans="2" fo:widows="2" fo:text-indent="0in" style:auto-text-indent="false"/>
      <style:text-properties fo:font-size="16pt" fo:font-weight="bold" officeooo:rsid="0085da97" officeooo:paragraph-rsid="00873c7e" style:font-size-asian="16pt" style:font-weight-asian="bold" style:font-size-complex="16pt" style:font-weight-complex="bold"/>
    </style:style>
    <style:style style:name="P89" style:family="paragraph" style:parent-style-name="Text_20_body">
      <style:paragraph-properties fo:margin-left="0in" fo:margin-right="0in" fo:orphans="2" fo:widows="2" fo:text-indent="0in" style:auto-text-indent="false"/>
      <style:text-properties fo:font-size="16pt" fo:font-weight="bold" officeooo:rsid="00873c7e" officeooo:paragraph-rsid="00873c7e" style:font-size-asian="16pt" style:font-weight-asian="bold" style:font-size-complex="16pt" style:font-weight-complex="bold"/>
    </style:style>
    <style:style style:name="P90" style:family="paragraph" style:parent-style-name="Text_20_body">
      <style:paragraph-properties fo:margin-left="0in" fo:margin-right="0in" fo:orphans="2" fo:widows="2" fo:text-indent="0in" style:auto-text-indent="false"/>
      <style:text-properties fo:font-size="12pt" fo:font-weight="normal" officeooo:rsid="00873c7e" officeooo:paragraph-rsid="00873c7e" style:font-size-asian="10.5pt" style:font-weight-asian="normal" style:font-size-complex="12pt" style:font-weight-complex="normal"/>
    </style:style>
    <style:style style:name="P91" style:family="paragraph" style:parent-style-name="Text_20_body">
      <style:paragraph-properties fo:margin-left="0in" fo:margin-right="0in" fo:orphans="2" fo:widows="2" fo:text-indent="0in" style:auto-text-indent="false"/>
      <style:text-properties fo:font-size="20pt" fo:font-weight="bold" officeooo:rsid="008e84b4" officeooo:paragraph-rsid="008e84b4" style:font-size-asian="20pt" style:font-weight-asian="bold" style:font-size-complex="20pt" style:font-weight-complex="bold"/>
    </style:style>
    <style:style style:name="P92" style:family="paragraph" style:parent-style-name="Text_20_body">
      <style:paragraph-properties fo:margin-left="0in" fo:margin-right="0in" fo:orphans="2" fo:widows="2" fo:text-indent="0in" style:auto-text-indent="false"/>
      <style:text-properties fo:font-size="12pt" fo:font-weight="normal" officeooo:rsid="008e84b4" officeooo:paragraph-rsid="008e84b4" style:font-size-asian="10.5pt" style:font-weight-asian="normal" style:font-size-complex="12pt" style:font-weight-complex="normal"/>
    </style:style>
    <style:style style:name="P93" style:family="paragraph" style:parent-style-name="Text_20_body">
      <style:paragraph-properties fo:margin-left="0in" fo:margin-right="0in" fo:orphans="2" fo:widows="2" fo:text-indent="0in" style:auto-text-indent="false"/>
      <style:text-properties fo:font-size="16pt" fo:font-weight="bold" officeooo:rsid="008e84b4" officeooo:paragraph-rsid="008e84b4" style:font-size-asian="14pt" style:font-weight-asian="bold" style:font-size-complex="16pt" style:font-weight-complex="bold"/>
    </style:style>
    <style:style style:name="P94" style:family="paragraph" style:parent-style-name="Text_20_body">
      <style:paragraph-properties fo:margin-left="0in" fo:margin-right="0in" fo:orphans="2" fo:widows="2" fo:text-indent="0in" style:auto-text-indent="false"/>
      <style:text-properties fo:font-size="16pt" fo:font-weight="bold" officeooo:rsid="0092786f" officeooo:paragraph-rsid="0092786f" style:font-size-asian="16pt" style:font-weight-asian="bold" style:font-size-complex="16pt" style:font-weight-complex="bold"/>
    </style:style>
    <style:style style:name="P95" style:family="paragraph" style:parent-style-name="Text_20_body">
      <style:paragraph-properties fo:margin-left="0in" fo:margin-right="0in" fo:orphans="2" fo:widows="2" fo:text-indent="0in" style:auto-text-indent="false"/>
      <style:text-properties fo:font-size="12pt" fo:font-weight="normal" officeooo:rsid="0092786f" officeooo:paragraph-rsid="0092786f" style:font-size-asian="10.5pt" style:font-weight-asian="normal" style:font-size-complex="12pt" style:font-weight-complex="normal"/>
    </style:style>
    <style:style style:name="P96" style:family="paragraph" style:parent-style-name="Text_20_body">
      <style:paragraph-properties fo:margin-left="0in" fo:margin-right="0in" fo:orphans="2" fo:widows="2" fo:text-indent="0in" style:auto-text-indent="false"/>
      <style:text-properties fo:font-size="12pt" fo:font-weight="normal" officeooo:rsid="0092786f" officeooo:paragraph-rsid="0093fd97" style:font-size-asian="10.5pt" style:font-weight-asian="normal" style:font-size-complex="12pt" style:font-weight-complex="normal"/>
    </style:style>
    <style:style style:name="P97" style:family="paragraph" style:parent-style-name="Text_20_body">
      <style:paragraph-properties fo:margin-left="0in" fo:margin-right="0in" fo:orphans="2" fo:widows="2" fo:text-indent="0in" style:auto-text-indent="false"/>
      <style:text-properties fo:font-size="16pt" fo:font-weight="bold" officeooo:rsid="0093fd97" officeooo:paragraph-rsid="0093fd97" style:font-size-asian="16pt" style:font-weight-asian="bold" style:font-size-complex="16pt" style:font-weight-complex="bold"/>
    </style:style>
    <style:style style:name="P98" style:family="paragraph" style:parent-style-name="Text_20_body">
      <style:paragraph-properties fo:margin-left="0in" fo:margin-right="0in" fo:orphans="2" fo:widows="2" fo:text-indent="0in" style:auto-text-indent="false"/>
      <style:text-properties fo:font-size="12pt" fo:font-weight="normal" officeooo:rsid="00940467" officeooo:paragraph-rsid="00940467" style:font-size-asian="10.5pt" style:font-weight-asian="normal" style:font-size-complex="12pt" style:font-weight-complex="normal"/>
    </style:style>
    <style:style style:name="P99" style:family="paragraph" style:parent-style-name="Text_20_body">
      <style:paragraph-properties fo:margin-left="0in" fo:margin-right="0in" fo:orphans="2" fo:widows="2" fo:text-indent="0in" style:auto-text-indent="false"/>
      <style:text-properties fo:font-size="16pt" fo:font-weight="bold" officeooo:rsid="00993c0d" officeooo:paragraph-rsid="00993c0d" style:font-size-asian="16pt" style:font-weight-asian="bold" style:font-size-complex="16pt" style:font-weight-complex="bold"/>
    </style:style>
    <style:style style:name="P100" style:family="paragraph" style:parent-style-name="Text_20_body">
      <style:paragraph-properties fo:margin-left="0in" fo:margin-right="0in" fo:orphans="2" fo:widows="2" fo:text-indent="0in" style:auto-text-indent="false"/>
      <style:text-properties fo:font-size="12pt" fo:font-weight="normal" officeooo:rsid="00993c0d" officeooo:paragraph-rsid="00993c0d" style:font-size-asian="10.5pt" style:font-weight-asian="normal" style:font-size-complex="12pt" style:font-weight-complex="normal"/>
    </style:style>
    <style:style style:name="P101" style:family="paragraph" style:parent-style-name="Text_20_body">
      <style:paragraph-properties fo:margin-left="0in" fo:margin-right="0in" fo:orphans="2" fo:widows="2" fo:text-indent="0in" style:auto-text-indent="false"/>
      <style:text-properties fo:font-size="16pt" fo:font-weight="bold" officeooo:rsid="0097a6a2" officeooo:paragraph-rsid="0097a6a2" style:font-size-asian="16pt" style:font-weight-asian="bold" style:font-size-complex="16pt" style:font-weight-complex="bold"/>
    </style:style>
    <style:style style:name="P102" style:family="paragraph" style:parent-style-name="Text_20_body">
      <style:paragraph-properties fo:margin-left="0in" fo:margin-right="0in" fo:orphans="2" fo:widows="2" fo:text-indent="0in" style:auto-text-indent="false"/>
      <style:text-properties fo:font-size="12pt" fo:font-weight="normal" officeooo:rsid="0097a6a2" officeooo:paragraph-rsid="0097a6a2" style:font-size-asian="10.5pt" style:font-weight-asian="normal" style:font-size-complex="12pt" style:font-weight-complex="normal"/>
    </style:style>
    <style:style style:name="P103" style:family="paragraph" style:parent-style-name="Text_20_body">
      <style:paragraph-properties fo:margin-left="0in" fo:margin-right="0in" fo:orphans="2" fo:widows="2" fo:text-indent="0in" style:auto-text-indent="false"/>
      <style:text-properties fo:font-size="20pt" fo:font-weight="bold" officeooo:rsid="00993c0d" officeooo:paragraph-rsid="00993c0d" style:font-size-asian="20pt" style:font-weight-asian="bold" style:font-size-complex="20pt" style:font-weight-complex="bold"/>
    </style:style>
    <style:style style:name="P104" style:family="paragraph" style:parent-style-name="Text_20_body">
      <style:paragraph-properties fo:margin-left="0in" fo:margin-right="0in" fo:orphans="2" fo:widows="2" fo:text-indent="0in" style:auto-text-indent="false"/>
      <style:text-properties fo:font-size="12pt" fo:font-weight="normal" officeooo:rsid="00993c0d" officeooo:paragraph-rsid="00993c0d" style:font-size-asian="12pt" style:font-weight-asian="normal" style:font-size-complex="12pt" style:font-weight-complex="normal"/>
    </style:style>
    <style:style style:name="P105" style:family="paragraph" style:parent-style-name="Text_20_body">
      <style:paragraph-properties fo:margin-left="0in" fo:margin-right="0in" fo:orphans="2" fo:widows="2" fo:text-indent="0in" style:auto-text-indent="false"/>
      <style:text-properties fo:font-size="16pt" fo:font-weight="bold" officeooo:rsid="00993c0d" officeooo:paragraph-rsid="00993c0d" style:font-size-asian="14pt" style:font-weight-asian="bold" style:font-size-complex="16pt" style:font-weight-complex="bold"/>
    </style:style>
    <style:style style:name="P106" style:family="paragraph" style:parent-style-name="Text_20_body">
      <style:paragraph-properties fo:margin-left="0in" fo:margin-right="0in" fo:orphans="2" fo:widows="2" fo:text-indent="0in" style:auto-text-indent="false"/>
      <style:text-properties fo:font-size="12pt" fo:font-weight="normal" officeooo:rsid="00993c0d" officeooo:paragraph-rsid="009e7921" style:font-size-asian="10.5pt" style:font-weight-asian="normal" style:font-size-complex="12pt" style:font-weight-complex="normal"/>
    </style:style>
    <style:style style:name="P107" style:family="paragraph" style:parent-style-name="Text_20_body">
      <style:paragraph-properties fo:margin-left="0in" fo:margin-right="0in" fo:orphans="2" fo:widows="2" fo:text-indent="0in" style:auto-text-indent="false"/>
      <style:text-properties fo:font-size="20pt" fo:font-weight="bold" officeooo:rsid="00993c0d" officeooo:paragraph-rsid="00a03a07" style:font-size-asian="20pt" style:font-weight-asian="bold" style:font-size-complex="20pt" style:font-weight-complex="bold"/>
    </style:style>
    <style:style style:name="P108" style:family="paragraph" style:parent-style-name="Text_20_body">
      <style:paragraph-properties fo:margin-left="0in" fo:margin-right="0in" fo:orphans="2" fo:widows="2" fo:text-indent="0in" style:auto-text-indent="false"/>
      <style:text-properties fo:font-size="16pt" fo:font-weight="bold" officeooo:rsid="00993c0d" officeooo:paragraph-rsid="00a03a07" style:font-size-asian="14pt" style:font-weight-asian="bold" style:font-size-complex="16pt" style:font-weight-complex="bold"/>
    </style:style>
    <style:style style:name="P109" style:family="paragraph" style:parent-style-name="Text_20_body">
      <style:paragraph-properties fo:margin-left="0in" fo:margin-right="0in" fo:orphans="2" fo:widows="2" fo:text-indent="0in" style:auto-text-indent="false"/>
      <style:text-properties fo:font-size="12pt" fo:font-weight="normal" officeooo:rsid="00993c0d" officeooo:paragraph-rsid="00a03a07" style:font-size-asian="10.5pt" style:font-weight-asian="normal" style:font-size-complex="12pt" style:font-weight-complex="normal"/>
    </style:style>
    <style:style style:name="P110" style:family="paragraph" style:parent-style-name="Text_20_body">
      <style:paragraph-properties fo:margin-left="0in" fo:margin-right="0in" fo:orphans="2" fo:widows="2" fo:text-indent="0in" style:auto-text-indent="false"/>
      <style:text-properties fo:font-size="20pt" fo:font-weight="bold" officeooo:rsid="00a27619" officeooo:paragraph-rsid="00a27619" style:font-size-asian="20pt" style:font-weight-asian="bold" style:font-size-complex="20pt" style:font-weight-complex="bold"/>
    </style:style>
    <style:style style:name="P111" style:family="paragraph" style:parent-style-name="Text_20_body">
      <style:paragraph-properties fo:margin-left="0in" fo:margin-right="0in" fo:orphans="2" fo:widows="2" fo:text-indent="0in" style:auto-text-indent="false"/>
      <style:text-properties fo:font-size="12pt" fo:font-weight="normal" officeooo:rsid="00a282a7" officeooo:paragraph-rsid="00a282a7" style:font-size-asian="10.5pt" style:font-weight-asian="normal" style:font-size-complex="12pt" style:font-weight-complex="normal"/>
    </style:style>
    <style:style style:name="P112" style:family="paragraph" style:parent-style-name="Text_20_body">
      <style:paragraph-properties fo:margin-left="0in" fo:margin-right="0in" fo:orphans="2" fo:widows="2" fo:text-indent="0in" style:auto-text-indent="false"/>
      <style:text-properties fo:font-size="20pt" fo:font-weight="bold" officeooo:rsid="00a282a7" officeooo:paragraph-rsid="00a282a7" style:font-size-asian="20pt" style:font-weight-asian="bold" style:font-size-complex="20pt" style:font-weight-complex="bold"/>
    </style:style>
    <style:style style:name="P113" style:family="paragraph" style:parent-style-name="Text_20_body">
      <style:paragraph-properties fo:margin-left="0in" fo:margin-right="0in" fo:orphans="2" fo:widows="2" fo:text-indent="0in" style:auto-text-indent="false"/>
      <style:text-properties fo:font-size="16pt" fo:font-weight="bold" officeooo:rsid="00a3591c" officeooo:paragraph-rsid="00a3591c" style:font-size-asian="14pt" style:font-weight-asian="bold" style:font-size-complex="16pt" style:font-weight-complex="bold"/>
    </style:style>
    <style:style style:name="P114" style:family="paragraph" style:parent-style-name="Text_20_body">
      <style:paragraph-properties fo:margin-left="0in" fo:margin-right="0in" fo:orphans="2" fo:widows="2" fo:text-indent="0in" style:auto-text-indent="false"/>
      <style:text-properties fo:font-size="12pt" fo:font-weight="normal" officeooo:rsid="00a3591c" officeooo:paragraph-rsid="00a3d9d5" style:font-size-asian="12pt" style:font-weight-asian="normal" style:font-size-complex="12pt" style:font-weight-complex="normal"/>
    </style:style>
    <style:style style:name="P115" style:family="paragraph" style:parent-style-name="Text_20_body">
      <style:paragraph-properties fo:margin-left="0in" fo:margin-right="0in" fo:orphans="2" fo:widows="2" fo:text-indent="0in" style:auto-text-indent="false"/>
      <style:text-properties fo:font-size="12pt" fo:font-weight="normal" officeooo:rsid="00a3d9d5" officeooo:paragraph-rsid="00a3d9d5" style:font-size-asian="12pt" style:font-weight-asian="normal" style:font-size-complex="12pt" style:font-weight-complex="normal"/>
    </style:style>
    <style:style style:name="P116" style:family="paragraph" style:parent-style-name="Text_20_body">
      <style:paragraph-properties fo:margin-left="0in" fo:margin-right="0in" fo:orphans="2" fo:widows="2" fo:text-indent="0in" style:auto-text-indent="false"/>
      <style:text-properties officeooo:paragraph-rsid="00a59d42"/>
    </style:style>
    <style:style style:name="P117" style:family="paragraph" style:parent-style-name="Text_20_body">
      <style:paragraph-properties fo:margin-left="0in" fo:margin-right="0in" fo:orphans="2" fo:widows="2" fo:text-indent="0in" style:auto-text-indent="false"/>
      <style:text-properties officeooo:paragraph-rsid="00a872f0"/>
    </style:style>
    <style:style style:name="P118" style:family="paragraph" style:parent-style-name="Standard">
      <style:text-properties officeooo:paragraph-rsid="00baa02f"/>
    </style:style>
    <style:style style:name="P119" style:family="paragraph" style:parent-style-name="Text_20_body">
      <style:paragraph-properties fo:margin-left="0in" fo:margin-right="0in" fo:orphans="2" fo:widows="2" fo:text-indent="0in" style:auto-text-indent="false"/>
      <style:text-properties officeooo:paragraph-rsid="00a9e2d9"/>
    </style:style>
    <style:style style:name="P120" style:family="paragraph" style:parent-style-name="Text_20_body">
      <style:paragraph-properties fo:margin-left="0in" fo:margin-right="0in" fo:orphans="2" fo:widows="2" fo:text-indent="0in" style:auto-text-indent="false"/>
      <style:text-properties officeooo:paragraph-rsid="00ace5e7"/>
    </style:style>
    <style:style style:name="P121" style:family="paragraph" style:parent-style-name="Text_20_body">
      <style:paragraph-properties fo:margin-left="0in" fo:margin-right="0in" fo:orphans="2" fo:widows="2" fo:text-indent="0in" style:auto-text-indent="false"/>
      <style:text-properties officeooo:paragraph-rsid="00b794f8"/>
    </style:style>
    <style:style style:name="P122" style:family="paragraph" style:parent-style-name="Text_20_body">
      <style:paragraph-properties fo:margin-left="0in" fo:margin-right="0in" fo:orphans="2" fo:widows="2" fo:text-indent="0in" style:auto-text-indent="false"/>
      <style:text-properties officeooo:paragraph-rsid="00af09c5"/>
    </style:style>
    <style:style style:name="P123" style:family="paragraph" style:parent-style-name="Standard">
      <style:text-properties fo:font-size="16pt" fo:font-style="normal" fo:font-weight="bold" officeooo:rsid="00251c23" officeooo:paragraph-rsid="00af09c5" style:font-size-asian="16pt" style:font-style-asian="normal" style:font-weight-asian="bold" style:font-size-complex="16pt" style:font-style-complex="normal" style:font-weight-complex="bold"/>
    </style:style>
    <style:style style:name="P124" style:family="paragraph" style:parent-style-name="Standard">
      <style:text-properties fo:font-size="12pt" fo:font-style="normal" fo:font-weight="bold" officeooo:rsid="00b80ecb" officeooo:paragraph-rsid="00b80ecb" style:font-size-asian="12pt" style:font-style-asian="normal" style:font-weight-asian="bold" style:font-size-complex="12pt" style:font-style-complex="normal" style:font-weight-complex="bold"/>
    </style:style>
    <style:style style:name="P125" style:family="paragraph" style:parent-style-name="Standard">
      <style:text-properties fo:font-size="12pt" fo:font-style="normal" fo:font-weight="normal" officeooo:rsid="00b80ecb" officeooo:paragraph-rsid="00b80ecb" style:font-size-asian="12pt" style:font-style-asian="normal" style:font-weight-asian="normal" style:font-size-complex="12pt" style:font-style-complex="normal" style:font-weight-complex="normal"/>
    </style:style>
    <style:style style:name="P126" style:family="paragraph" style:parent-style-name="Standard">
      <style:text-properties fo:font-size="12pt" fo:font-style="normal" fo:font-weight="normal" officeooo:rsid="00b865b3" officeooo:paragraph-rsid="00b865b3" style:font-size-asian="12pt" style:font-style-asian="normal" style:font-weight-asian="normal" style:font-size-complex="12pt" style:font-style-complex="normal" style:font-weight-complex="normal"/>
    </style:style>
    <style:style style:name="P127" style:family="paragraph" style:parent-style-name="Standard">
      <style:text-properties fo:font-size="12pt" fo:font-style="normal" fo:font-weight="bold" officeooo:rsid="00b865b3" officeooo:paragraph-rsid="00b865b3" style:font-size-asian="12pt" style:font-style-asian="normal" style:font-weight-asian="bold" style:font-size-complex="12pt" style:font-style-complex="normal" style:font-weight-complex="bold"/>
    </style:style>
    <style:style style:name="P128" style:family="paragraph" style:parent-style-name="Standard">
      <style:text-properties fo:font-size="16pt" fo:font-style="normal" fo:font-weight="bold" officeooo:rsid="00b865b3" officeooo:paragraph-rsid="00b865b3" style:font-size-asian="16pt" style:font-style-asian="normal" style:font-weight-asian="bold" style:font-size-complex="16pt" style:font-style-complex="normal" style:font-weight-complex="bold"/>
    </style:style>
    <style:style style:name="P129" style:family="paragraph" style:parent-style-name="Standard">
      <style:text-properties fo:font-size="12pt" fo:font-style="normal" fo:font-weight="normal" officeooo:rsid="00b794f8" officeooo:paragraph-rsid="00b80ecb" style:font-size-asian="10.5pt" style:font-style-asian="normal" style:font-weight-asian="normal" style:font-size-complex="12pt" style:font-style-complex="normal" style:font-weight-complex="normal"/>
    </style:style>
    <style:style style:name="P130" style:family="paragraph" style:parent-style-name="Standard">
      <style:text-properties fo:font-size="12pt" fo:font-style="normal" fo:font-weight="normal" officeooo:rsid="00b794f8" officeooo:paragraph-rsid="00b794f8" style:font-size-asian="10.5pt" style:font-style-asian="normal" style:font-weight-asian="normal" style:font-size-complex="12pt" style:font-style-complex="normal" style:font-weight-complex="normal"/>
    </style:style>
    <style:style style:name="P131" style:family="paragraph" style:parent-style-name="Standard">
      <style:text-properties fo:font-size="12pt" fo:font-style="normal" fo:font-weight="bold" officeooo:rsid="00b794f8" officeooo:paragraph-rsid="00b794f8" style:font-size-asian="10.5pt" style:font-style-asian="normal" style:font-weight-asian="bold" style:font-size-complex="12pt" style:font-style-complex="normal" style:font-weight-complex="bold"/>
    </style:style>
    <style:style style:name="P132" style:family="paragraph" style:parent-style-name="Standard">
      <style:text-properties fo:font-size="16pt" fo:font-style="normal" fo:font-weight="bold" officeooo:rsid="00251c23" officeooo:paragraph-rsid="00b794f8" style:font-size-asian="16pt" style:font-style-asian="normal" style:font-weight-asian="bold" style:font-size-complex="16pt" style:font-style-complex="normal" style:font-weight-complex="bold"/>
    </style:style>
    <style:style style:name="P133" style:family="paragraph" style:parent-style-name="Standard">
      <style:text-properties fo:font-size="12pt" fo:font-style="normal" fo:font-weight="bold" officeooo:rsid="00251c23" officeooo:paragraph-rsid="00af09c5" style:font-size-asian="10.5pt" style:font-style-asian="normal" style:font-weight-asian="bold" style:font-size-complex="12pt" style:font-style-complex="normal" style:font-weight-complex="bold"/>
    </style:style>
    <style:style style:name="P134" style:family="paragraph" style:parent-style-name="Standard">
      <style:text-properties fo:font-size="12pt" fo:font-style="normal" fo:font-weight="normal" officeooo:rsid="00251c23" officeooo:paragraph-rsid="00af09c5" style:font-size-asian="10.5pt" style:font-style-asian="normal" style:font-weight-asian="normal" style:font-size-complex="12pt" style:font-style-complex="normal" style:font-weight-complex="normal"/>
    </style:style>
    <style:style style:name="P135" style:family="paragraph" style:parent-style-name="Standard">
      <style:text-properties fo:font-size="12pt" fo:font-style="normal" fo:font-weight="normal" officeooo:rsid="0026b55c" officeooo:paragraph-rsid="00af09c5" style:font-size-asian="10.5pt" style:font-style-asian="normal" style:font-weight-asian="normal" style:font-size-complex="12pt" style:font-style-complex="normal" style:font-weight-complex="normal"/>
    </style:style>
    <style:style style:name="P136" style:family="paragraph" style:parent-style-name="Standard">
      <style:text-properties fo:font-size="12pt" fo:font-style="normal" fo:font-weight="normal" officeooo:rsid="00228e66" officeooo:paragraph-rsid="00af09c5" style:font-size-asian="12pt" style:font-style-asian="normal" style:font-weight-asian="normal" style:font-size-complex="12pt" style:font-style-complex="normal" style:font-weight-complex="normal"/>
    </style:style>
    <style:style style:name="P137" style:family="paragraph" style:parent-style-name="Standard">
      <style:text-properties fo:font-size="12pt" fo:font-style="normal" fo:font-weight="normal" officeooo:rsid="000f1254" officeooo:paragraph-rsid="00af09c5" style:font-size-asian="12pt" style:font-style-asian="normal" style:font-weight-asian="normal" style:font-size-complex="12pt" style:font-style-complex="normal" style:font-weight-complex="normal"/>
    </style:style>
    <style:style style:name="P138" style:family="paragraph" style:parent-style-name="Standard">
      <style:text-properties officeooo:paragraph-rsid="00af09c5"/>
    </style:style>
    <style:style style:name="P139" style:family="paragraph" style:parent-style-name="Text_20_body">
      <style:paragraph-properties fo:margin-left="0in" fo:margin-right="0in" fo:orphans="2" fo:widows="2" fo:text-indent="0in" style:auto-text-indent="false"/>
      <style:text-properties officeooo:paragraph-rsid="00b2188d"/>
    </style:style>
    <style:style style:name="P140" style:family="paragraph" style:parent-style-name="Text_20_body">
      <style:paragraph-properties fo:margin-left="0in" fo:margin-right="0in" fo:orphans="2" fo:widows="2" fo:text-indent="0in" style:auto-text-indent="false"/>
      <style:text-properties officeooo:paragraph-rsid="00b67e56"/>
    </style:style>
    <style:style style:name="P141" style:family="paragraph" style:parent-style-name="Text_20_body">
      <style:paragraph-properties fo:margin-left="0in" fo:margin-right="0in" fo:orphans="2" fo:widows="2" fo:text-indent="0in" style:auto-text-indent="false"/>
      <style:text-properties officeooo:paragraph-rsid="00c2cc14"/>
    </style:style>
    <style:style style:name="P142" style:family="paragraph" style:parent-style-name="Standard">
      <style:text-properties fo:font-size="16pt" fo:font-style="normal" fo:font-weight="bold" officeooo:rsid="00251c23" officeooo:paragraph-rsid="00c2cc14" style:font-size-asian="16pt" style:font-style-asian="normal" style:font-weight-asian="bold" style:font-size-complex="16pt" style:font-style-complex="normal" style:font-weight-complex="bold"/>
    </style:style>
    <style:style style:name="P143" style:family="paragraph" style:parent-style-name="Standard">
      <style:text-properties fo:font-size="16pt" fo:font-style="normal" fo:font-weight="bold" officeooo:rsid="00251c23" officeooo:paragraph-rsid="00cc3980" style:font-size-asian="16pt" style:font-style-asian="normal" style:font-weight-asian="bold" style:font-size-complex="16pt" style:font-style-complex="normal" style:font-weight-complex="bold"/>
    </style:style>
    <style:style style:name="P144" style:family="paragraph">
      <loext:graphic-properties draw:fill="solid" draw:fill-color="#729fcf" draw:opacity="0%"/>
    </style:style>
    <style:style style:name="P145" style:family="paragraph" style:parent-style-name="Standard">
      <style:text-properties fo:font-size="16pt" fo:font-style="normal" fo:font-weight="bold" officeooo:rsid="00251c23" officeooo:paragraph-rsid="00c58bf7" style:font-size-asian="16pt" style:font-style-asian="normal" style:font-weight-asian="bold" style:font-size-complex="16pt" style:font-style-complex="normal" style:font-weight-complex="bold"/>
    </style:style>
    <style:style style:name="P146" style:family="paragraph" style:parent-style-name="Standard">
      <style:text-properties fo:font-size="16pt" fo:font-style="normal" fo:font-weight="bold" officeooo:rsid="00251c23" officeooo:paragraph-rsid="00ca685e" style:font-size-asian="16pt" style:font-style-asian="normal" style:font-weight-asian="bold" style:font-size-complex="16pt" style:font-style-complex="normal" style:font-weight-complex="bold"/>
    </style:style>
    <style:style style:name="P147" style:family="paragraph" style:parent-style-name="Standard">
      <style:text-properties fo:font-size="16pt" fo:font-style="normal" fo:font-weight="bold" officeooo:rsid="00251c23" officeooo:paragraph-rsid="00cbaad9" style:font-size-asian="16pt" style:font-style-asian="normal" style:font-weight-asian="bold" style:font-size-complex="16pt" style:font-style-complex="normal" style:font-weight-complex="bold"/>
    </style:style>
    <style:style style:name="P148" style:family="paragraph" style:parent-style-name="Standard">
      <style:text-properties fo:font-size="16pt" fo:font-style="normal" fo:font-weight="bold" officeooo:rsid="00251c23" officeooo:paragraph-rsid="00d15f43" style:font-size-asian="16pt" style:font-style-asian="normal" style:font-weight-asian="bold" style:font-size-complex="16pt" style:font-style-complex="normal" style:font-weight-complex="bold"/>
    </style:style>
    <style:style style:name="P149" style:family="paragraph" style:parent-style-name="Standard">
      <style:text-properties fo:font-size="12pt" fo:font-style="normal" fo:font-weight="normal" officeooo:rsid="00d29fbf" officeooo:paragraph-rsid="00d29fbf" style:font-size-asian="10.5pt" style:font-style-asian="normal" style:font-weight-asian="normal" style:font-size-complex="12pt" style:font-style-complex="normal" style:font-weight-complex="normal"/>
    </style:style>
    <style:style style:name="P150" style:family="paragraph" style:parent-style-name="Standard">
      <style:text-properties fo:font-size="12pt" fo:font-style="normal" fo:font-weight="normal" officeooo:rsid="00dad091" officeooo:paragraph-rsid="00dad091" style:font-size-asian="10.5pt" style:font-style-asian="normal" style:font-weight-asian="normal" style:font-size-complex="12pt" style:font-style-complex="normal" style:font-weight-complex="normal"/>
    </style:style>
    <style:style style:name="P151" style:family="paragraph" style:parent-style-name="Standard">
      <style:text-properties fo:font-size="20pt" fo:font-style="normal" fo:font-weight="bold" officeooo:rsid="00e2aee0" officeooo:paragraph-rsid="00e2aee0" style:font-size-asian="20pt" style:font-style-asian="normal" style:font-weight-asian="bold" style:font-size-complex="20pt" style:font-style-complex="normal" style:font-weight-complex="bold"/>
    </style:style>
    <style:style style:name="P152" style:family="paragraph" style:parent-style-name="Standard">
      <style:text-properties fo:font-size="12pt" fo:font-style="normal" fo:font-weight="bold" officeooo:rsid="00e2aee0" officeooo:paragraph-rsid="00e2aee0" style:font-size-asian="10.5pt" style:font-style-asian="normal" style:font-weight-asian="bold" style:font-size-complex="12pt" style:font-style-complex="normal" style:font-weight-complex="bold"/>
    </style:style>
    <style:style style:name="P153" style:family="paragraph" style:parent-style-name="Standard">
      <style:text-properties fo:font-size="12pt" fo:font-style="normal" fo:font-weight="normal" officeooo:rsid="00e2aee0" officeooo:paragraph-rsid="00e2aee0" style:font-size-asian="10.5pt" style:font-style-asian="normal" style:font-weight-asian="normal" style:font-size-complex="12pt" style:font-style-complex="normal" style:font-weight-complex="normal"/>
    </style:style>
    <style:style style:name="P154" style:family="paragraph" style:parent-style-name="Standard">
      <style:text-properties fo:font-size="12pt" fo:font-style="normal" fo:font-weight="normal" officeooo:rsid="00e44b02" officeooo:paragraph-rsid="00e44b02" style:font-size-asian="10.5pt" style:font-style-asian="normal" style:font-weight-asian="normal" style:font-size-complex="12pt" style:font-style-complex="normal" style:font-weight-complex="normal"/>
    </style:style>
    <style:style style:name="P155" style:family="paragraph" style:parent-style-name="Standard">
      <style:text-properties fo:font-size="12pt" fo:font-style="normal" fo:font-weight="normal" officeooo:rsid="00e611ba" officeooo:paragraph-rsid="00e611ba" style:font-size-asian="10.5pt" style:font-style-asian="normal" style:font-weight-asian="normal" style:font-size-complex="12pt" style:font-style-complex="normal" style:font-weight-complex="normal"/>
    </style:style>
    <style:style style:name="T1" style:family="text">
      <style:text-properties officeooo:rsid="006402c8"/>
    </style:style>
    <style:style style:name="T2" style:family="text">
      <style:text-properties officeooo:rsid="009bebd6"/>
    </style:style>
    <style:style style:name="T3" style:family="text">
      <style:text-properties fo:font-style="italic" style:font-style-asian="italic" style:font-style-complex="italic"/>
    </style:style>
    <style:style style:name="T4" style:family="text">
      <style:text-properties officeooo:rsid="0004d19b"/>
    </style:style>
    <style:style style:name="T5" style:family="text">
      <style:text-properties officeooo:rsid="00dca592"/>
    </style:style>
    <style:style style:name="T6" style:family="text">
      <style:text-properties officeooo:rsid="0003da94"/>
    </style:style>
    <style:style style:name="T7" style:family="text">
      <style:text-properties fo:font-style="italic" officeooo:rsid="0003da94" style:font-style-asian="italic" style:font-style-complex="italic"/>
    </style:style>
    <style:style style:name="T8" style:family="text">
      <style:text-properties officeooo:rsid="009b9c80"/>
    </style:style>
    <style:style style:name="T9" style:family="text">
      <style:text-properties officeooo:rsid="00365661"/>
    </style:style>
    <style:style style:name="T10" style:family="text">
      <style:text-properties officeooo:rsid="002e0fc4"/>
    </style:style>
    <style:style style:name="T11" style:family="text">
      <style:text-properties officeooo:rsid="00d65bfe"/>
    </style:style>
    <style:style style:name="T12" style:family="text">
      <style:text-properties officeooo:rsid="00d471bf"/>
    </style:style>
    <style:style style:name="T13" style:family="text">
      <style:text-properties officeooo:rsid="00d96d95"/>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officeooo:rsid="000cb19f" style:font-style-asian="normal" style:font-style-complex="normal"/>
    </style:style>
    <style:style style:name="T17" style:family="text">
      <style:text-properties fo:font-style="italic" officeooo:rsid="00f048d4" style:font-style-asian="italic" style:font-style-complex="italic"/>
    </style:style>
    <style:style style:name="T18" style:family="text">
      <style:text-properties fo:font-style="italic" officeooo:rsid="001a028a" style:font-style-asian="italic" style:font-style-complex="italic"/>
    </style:style>
    <style:style style:name="T19" style:family="text">
      <style:text-properties fo:font-style="normal" officeooo:rsid="001a028a" style:font-style-asian="normal" style:font-style-complex="normal"/>
    </style:style>
    <style:style style:name="T20" style:family="text">
      <style:text-properties fo:font-style="normal" officeooo:rsid="001a38d0" style:font-style-asian="normal" style:font-style-complex="normal"/>
    </style:style>
    <style:style style:name="T21" style:family="text">
      <style:text-properties fo:font-style="italic" fo:font-weight="bold" officeooo:rsid="003ef2e6" style:font-style-asian="italic" style:font-weight-asian="bold" style:font-style-complex="italic" style:font-weight-complex="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3ef2e6"/>
    </style:style>
    <style:style style:name="T24" style:family="text">
      <style:text-properties fo:font-weight="bold" style:font-weight-asian="bold" style:font-weight-complex="bold"/>
    </style:style>
    <style:style style:name="T25" style:family="text">
      <style:text-properties officeooo:rsid="0020260a"/>
    </style:style>
    <style:style style:name="T26" style:family="text">
      <style:text-properties officeooo:rsid="009c111a"/>
    </style:style>
    <style:style style:name="T27" style:family="text">
      <style:text-properties officeooo:rsid="00608540"/>
    </style:style>
    <style:style style:name="T28" style:family="text">
      <style:text-properties fo:font-size="12pt" fo:font-weight="normal" officeooo:rsid="009c111a" style:font-size-asian="10.5pt" style:font-weight-asian="normal" style:font-size-complex="12pt" style:font-weight-complex="normal"/>
    </style:style>
    <style:style style:name="T29" style:family="text">
      <style:text-properties fo:font-size="12pt" fo:font-weight="normal" officeooo:rsid="000cb19f" style:font-size-asian="10.5pt" style:font-weight-asian="normal" style:font-size-complex="12pt" style:font-weight-complex="normal"/>
    </style:style>
    <style:style style:name="T30" style:family="text">
      <style:text-properties fo:font-size="12pt" fo:font-weight="normal" officeooo:rsid="000e80b1" style:font-size-asian="10.5pt" style:font-weight-asian="normal" style:font-size-complex="12pt" style:font-weight-complex="normal"/>
    </style:style>
    <style:style style:name="T31" style:family="text">
      <style:text-properties fo:font-size="12pt" fo:font-weight="normal" officeooo:rsid="003c96aa" style:font-size-asian="10.5pt" style:font-weight-asian="normal" style:font-size-complex="12pt" style:font-weight-complex="normal"/>
    </style:style>
    <style:style style:name="T32" style:family="text">
      <style:text-properties fo:font-size="12pt" fo:font-weight="normal" officeooo:rsid="003bc0df" style:font-size-asian="10.5pt" style:font-weight-asian="normal" style:font-size-complex="12pt" style:font-weight-complex="normal"/>
    </style:style>
    <style:style style:name="T33" style:family="text">
      <style:text-properties fo:font-size="12pt" fo:font-style="italic" fo:font-weight="normal" officeooo:rsid="000e80b1" style:font-size-asian="10.5pt" style:font-style-asian="italic" style:font-weight-asian="normal" style:font-size-complex="12pt" style:font-style-complex="italic" style:font-weight-complex="normal"/>
    </style:style>
    <style:style style:name="T34" style:family="text">
      <style:text-properties fo:font-size="12pt" fo:font-style="italic" fo:font-weight="normal" officeooo:rsid="000cb19f" style:font-size-asian="10.5pt" style:font-style-asian="italic" style:font-weight-asian="normal" style:font-size-complex="12pt" style:font-style-complex="italic" style:font-weight-complex="normal"/>
    </style:style>
    <style:style style:name="T35" style:family="text">
      <style:text-properties fo:font-size="12pt" officeooo:rsid="000cb19f" style:font-size-asian="10.5pt" style:font-size-complex="12pt"/>
    </style:style>
    <style:style style:name="T36" style:family="text">
      <style:text-properties fo:font-size="12pt" officeooo:rsid="0009abaa" style:font-size-asian="10.5pt" style:font-size-complex="12pt"/>
    </style:style>
    <style:style style:name="T37" style:family="text">
      <style:text-properties fo:font-size="12pt" fo:font-weight="normal" officeooo:rsid="0009abaa" style:font-size-asian="10.5pt" style:font-weight-asian="normal" style:font-size-complex="12pt" style:font-weight-complex="normal"/>
    </style:style>
    <style:style style:name="T38" style:family="text">
      <style:text-properties fo:font-size="12pt" fo:font-weight="normal" officeooo:rsid="001aaa0d" style:font-size-asian="10.5pt" style:font-weight-asian="normal" style:font-size-complex="12pt" style:font-weight-complex="normal"/>
    </style:style>
    <style:style style:name="T39" style:family="text">
      <style:text-properties fo:font-style="italic" fo:font-weight="bold" officeooo:rsid="00447121" style:font-style-asian="italic" style:font-weight-asian="bold" style:font-style-complex="italic" style:font-weight-complex="bold"/>
    </style:style>
    <style:style style:name="T40" style:family="text">
      <style:text-properties officeooo:rsid="004174b6"/>
    </style:style>
    <style:style style:name="T41" style:family="text">
      <style:text-properties officeooo:rsid="00387cd5"/>
    </style:style>
    <style:style style:name="T42" style:family="text">
      <style:text-properties fo:font-weight="bold" officeooo:rsid="00387cd5" style:font-weight-asian="bold" style:font-weight-complex="bold"/>
    </style:style>
    <style:style style:name="T43" style:family="text">
      <style:text-properties officeooo:rsid="003a2b89"/>
    </style:style>
    <style:style style:name="T44" style:family="text">
      <style:text-properties fo:font-weight="bold" officeooo:rsid="003a2b89" style:font-weight-asian="bold" style:font-weight-complex="bold"/>
    </style:style>
    <style:style style:name="T45" style:family="text">
      <style:text-properties fo:font-style="italic" fo:font-weight="bold" officeooo:rsid="00387cd5" style:font-style-asian="italic" style:font-weight-asian="bold" style:font-style-complex="italic" style:font-weight-complex="bold"/>
    </style:style>
    <style:style style:name="T46" style:family="text">
      <style:text-properties fo:font-style="italic" fo:font-weight="bold" officeooo:rsid="003a2b89" style:font-style-asian="italic" style:font-weight-asian="bold" style:font-style-complex="italic" style:font-weight-complex="bold"/>
    </style:style>
    <style:style style:name="T47" style:family="text">
      <style:text-properties fo:font-style="italic" fo:font-weight="bold" officeooo:rsid="00f048d4" style:font-style-asian="italic" style:font-weight-asian="bold" style:font-style-complex="italic" style:font-weight-complex="bold"/>
    </style:style>
    <style:style style:name="T48" style:family="text">
      <style:text-properties fo:font-style="italic" officeooo:rsid="00387cd5" style:font-style-asian="italic" style:font-style-complex="italic"/>
    </style:style>
    <style:style style:name="T49" style:family="text">
      <style:text-properties officeooo:rsid="0042eacd"/>
    </style:style>
    <style:style style:name="T50" style:family="text">
      <style:text-properties fo:font-style="italic" fo:font-weight="bold" officeooo:rsid="0042eacd" style:font-style-asian="italic" style:font-weight-asian="bold" style:font-style-complex="italic" style:font-weight-complex="bold"/>
    </style:style>
    <style:style style:name="T51" style:family="text">
      <style:text-properties officeooo:rsid="0050bb85"/>
    </style:style>
    <style:style style:name="T52" style:family="text">
      <style:text-properties officeooo:rsid="0052b85f"/>
    </style:style>
    <style:style style:name="T53" style:family="text">
      <style:text-properties officeooo:rsid="00dea25b"/>
    </style:style>
    <style:style style:name="T54" style:family="text">
      <style:text-properties officeooo:rsid="00df768a"/>
    </style:style>
    <style:style style:name="T55" style:family="text">
      <style:text-properties officeooo:rsid="001d730f"/>
    </style:style>
    <style:style style:name="T56" style:family="text">
      <style:text-properties officeooo:rsid="0058fb23"/>
    </style:style>
    <style:style style:name="T57" style:family="text">
      <style:text-properties officeooo:rsid="0022150a"/>
    </style:style>
    <style:style style:name="T58" style:family="text">
      <style:text-properties officeooo:rsid="00306a0d"/>
    </style:style>
    <style:style style:name="T59" style:family="text">
      <style:text-properties officeooo:rsid="000cb19f"/>
    </style:style>
    <style:style style:name="T60" style:family="text">
      <style:text-properties officeooo:rsid="0032422a"/>
    </style:style>
    <style:style style:name="T61" style:family="text">
      <style:text-properties officeooo:rsid="000b3d2f"/>
    </style:style>
    <style:style style:name="T62" style:family="text">
      <style:text-properties fo:font-style="italic" fo:font-weight="bold" officeooo:rsid="0032422a" style:font-style-asian="italic" style:font-weight-asian="bold" style:font-style-complex="italic" style:font-weight-complex="bold"/>
    </style:style>
    <style:style style:name="T63" style:family="text">
      <style:text-properties fo:font-size="12pt" fo:font-style="normal" fo:font-weight="normal" officeooo:rsid="0009abaa" style:font-size-asian="12pt" style:font-style-asian="normal" style:font-weight-asian="normal" style:font-size-complex="12pt" style:font-style-complex="normal" style:font-weight-complex="normal"/>
    </style:style>
    <style:style style:name="T64" style:family="text">
      <style:text-properties fo:font-size="12pt" fo:font-style="normal" fo:font-weight="normal" officeooo:rsid="000b3d2f" style:font-size-asian="12pt" style:font-style-asian="normal" style:font-weight-asian="normal" style:font-size-complex="12pt" style:font-style-complex="normal" style:font-weight-complex="normal"/>
    </style:style>
    <style:style style:name="T65" style:family="text">
      <style:text-properties fo:font-size="12pt" fo:font-style="normal" fo:font-weight="normal" officeooo:rsid="001864b7" style:font-size-asian="12pt" style:font-style-asian="normal" style:font-weight-asian="normal" style:font-size-complex="12pt" style:font-style-complex="normal" style:font-weight-complex="normal"/>
    </style:style>
    <style:style style:name="T66" style:family="text">
      <style:text-properties fo:font-size="12pt" fo:font-style="normal" fo:font-weight="normal" officeooo:rsid="005aa4ad" style:font-size-asian="12pt" style:font-style-asian="normal" style:font-weight-asian="normal" style:font-size-complex="12pt" style:font-style-complex="normal" style:font-weight-complex="normal"/>
    </style:style>
    <style:style style:name="T67" style:family="text">
      <style:text-properties fo:font-size="12pt" fo:font-style="normal" fo:font-weight="normal" officeooo:rsid="005b721e" style:font-size-asian="12pt" style:font-style-asian="normal" style:font-weight-asian="normal" style:font-size-complex="12pt" style:font-style-complex="normal" style:font-weight-complex="normal"/>
    </style:style>
    <style:style style:name="T68" style:family="text">
      <style:text-properties fo:font-size="12pt" fo:font-style="italic" fo:font-weight="normal" officeooo:rsid="005b721e" style:font-size-asian="12pt" style:font-style-asian="italic" style:font-weight-asian="normal" style:font-size-complex="12pt" style:font-style-complex="italic" style:font-weight-complex="normal"/>
    </style:style>
    <style:style style:name="T69" style:family="text">
      <style:text-properties fo:font-size="12pt" fo:font-style="normal" fo:font-weight="normal" officeooo:rsid="00f65e19" style:font-size-asian="12pt" style:font-style-asian="normal" style:font-weight-asian="normal" style:font-size-complex="12pt" style:font-style-complex="normal" style:font-weight-complex="normal"/>
    </style:style>
    <style:style style:name="T70" style:family="text">
      <style:text-properties fo:font-size="12pt" fo:font-style="italic" fo:font-weight="normal" officeooo:rsid="00f65e19" style:font-size-asian="12pt" style:font-style-asian="italic" style:font-weight-asian="normal" style:font-size-complex="12pt" style:font-style-complex="italic" style:font-weight-complex="normal"/>
    </style:style>
    <style:style style:name="T71" style:family="text">
      <style:text-properties officeooo:rsid="00f65e19"/>
    </style:style>
    <style:style style:name="T72" style:family="text">
      <style:text-properties officeooo:rsid="0010dec7"/>
    </style:style>
    <style:style style:name="T73" style:family="text">
      <style:text-properties officeooo:rsid="00f048d4"/>
    </style:style>
    <style:style style:name="T74" style:family="text">
      <style:text-properties officeooo:rsid="0012baca"/>
    </style:style>
    <style:style style:name="T75" style:family="text">
      <style:text-properties fo:font-style="italic" fo:font-weight="bold" officeooo:rsid="0012baca" style:font-style-asian="italic" style:font-weight-asian="bold" style:font-style-complex="italic" style:font-weight-complex="bold"/>
    </style:style>
    <style:style style:name="T76" style:family="text">
      <style:text-properties officeooo:rsid="0017d35e"/>
    </style:style>
    <style:style style:name="T77" style:family="text">
      <style:text-properties fo:font-style="italic" officeooo:rsid="0012baca" style:font-style-asian="italic" style:font-style-complex="italic"/>
    </style:style>
    <style:style style:name="T78" style:family="text">
      <style:text-properties fo:font-weight="bold" officeooo:rsid="0012baca" style:font-weight-asian="bold" style:font-weight-complex="bold"/>
    </style:style>
    <style:style style:name="T79" style:family="text">
      <style:text-properties officeooo:rsid="00f31aef"/>
    </style:style>
    <style:style style:name="T80" style:family="text">
      <style:text-properties fo:font-size="16pt" officeooo:rsid="00762823" style:font-size-asian="16pt" style:font-size-complex="16pt"/>
    </style:style>
    <style:style style:name="T81" style:family="text">
      <style:text-properties fo:font-size="16pt" style:font-size-asian="16pt" style:font-size-complex="16pt"/>
    </style:style>
    <style:style style:name="T82" style:family="text">
      <style:text-properties officeooo:rsid="00779e6b"/>
    </style:style>
    <style:style style:name="T83" style:family="text">
      <style:text-properties officeooo:rsid="005fd083"/>
    </style:style>
    <style:style style:name="T84" style:family="text">
      <style:text-properties fo:font-weight="normal" officeooo:rsid="00779e6b" style:font-weight-asian="normal" style:font-weight-complex="normal"/>
    </style:style>
    <style:style style:name="T85" style:family="text">
      <style:text-properties officeooo:rsid="00762823"/>
    </style:style>
    <style:style style:name="T86" style:family="text">
      <style:text-properties officeooo:rsid="007be61d"/>
    </style:style>
    <style:style style:name="T87" style:family="text">
      <style:text-properties officeooo:rsid="0081d2e8"/>
    </style:style>
    <style:style style:name="T88" style:family="text">
      <style:text-properties officeooo:rsid="0082e301"/>
    </style:style>
    <style:style style:name="T89" style:family="text">
      <style:text-properties fo:font-weight="bold" officeooo:rsid="0050bb85" style:font-weight-asian="bold" style:font-weight-complex="bold"/>
    </style:style>
    <style:style style:name="T90" style:family="text">
      <style:text-properties officeooo:rsid="00522b65"/>
    </style:style>
    <style:style style:name="T91" style:family="text">
      <style:text-properties officeooo:rsid="0056d829"/>
    </style:style>
    <style:style style:name="T92" style:family="text">
      <style:text-properties officeooo:rsid="0054a830"/>
    </style:style>
    <style:style style:name="T93" style:family="text">
      <style:text-properties officeooo:rsid="0064cb7f"/>
    </style:style>
    <style:style style:name="T94" style:family="text">
      <style:text-properties officeooo:rsid="0055f918"/>
    </style:style>
    <style:style style:name="T95" style:family="text">
      <style:text-properties officeooo:rsid="00726448"/>
    </style:style>
    <style:style style:name="T96" style:family="text">
      <style:text-properties officeooo:rsid="0072da78"/>
    </style:style>
    <style:style style:name="T97" style:family="text">
      <style:text-properties officeooo:rsid="00664f50"/>
    </style:style>
    <style:style style:name="T98" style:family="text">
      <style:text-properties officeooo:rsid="006db91c"/>
    </style:style>
    <style:style style:name="T99" style:family="text">
      <style:text-properties officeooo:rsid="0067f633"/>
    </style:style>
    <style:style style:name="T100" style:family="text">
      <style:text-properties fo:font-weight="normal" officeooo:rsid="0067f633" style:font-weight-asian="normal" style:font-weight-complex="normal"/>
    </style:style>
    <style:style style:name="T101" style:family="text">
      <style:text-properties officeooo:rsid="006e4a47"/>
    </style:style>
    <style:style style:name="T102" style:family="text">
      <style:text-properties officeooo:rsid="006f2f95"/>
    </style:style>
    <style:style style:name="T103" style:family="text">
      <style:text-properties officeooo:rsid="006905fc"/>
    </style:style>
    <style:style style:name="T104" style:family="text">
      <style:text-properties officeooo:rsid="006aae0f"/>
    </style:style>
    <style:style style:name="T105" style:family="text">
      <style:text-properties officeooo:rsid="0070c0d3"/>
    </style:style>
    <style:style style:name="T106" style:family="text">
      <style:text-properties officeooo:rsid="008c2d33"/>
    </style:style>
    <style:style style:name="T107" style:family="text">
      <style:text-properties fo:font-weight="bold" officeooo:rsid="008c2d33" style:font-weight-asian="bold" style:font-weight-complex="bold"/>
    </style:style>
    <style:style style:name="T108" style:family="text">
      <style:text-properties officeooo:rsid="00fea4bd"/>
    </style:style>
    <style:style style:name="T109" style:family="text">
      <style:text-properties fo:font-weight="bold"/>
    </style:style>
    <style:style style:name="T110" style:family="text">
      <style:text-properties officeooo:rsid="00873c7e"/>
    </style:style>
    <style:style style:name="T111" style:family="text">
      <style:text-properties officeooo:rsid="008b91b7"/>
    </style:style>
    <style:style style:name="T112" style:family="text">
      <style:text-properties fo:font-weight="bold" officeooo:rsid="008b91b7" style:font-weight-asian="bold" style:font-weight-complex="bold"/>
    </style:style>
    <style:style style:name="T113" style:family="text">
      <style:text-properties officeooo:rsid="0092786f"/>
    </style:style>
    <style:style style:name="T114" style:family="text">
      <style:text-properties officeooo:rsid="008f067b"/>
    </style:style>
    <style:style style:name="T115" style:family="text">
      <style:text-properties fo:font-weight="bold" officeooo:rsid="008f067b" style:font-weight-asian="bold" style:font-weight-complex="bold"/>
    </style:style>
    <style:style style:name="T116" style:family="text">
      <style:text-properties officeooo:rsid="0093fd97"/>
    </style:style>
    <style:style style:name="T117" style:family="text">
      <style:text-properties fo:font-weight="bold" officeooo:rsid="0093fd97" style:font-weight-asian="bold" style:font-weight-complex="bold"/>
    </style:style>
    <style:style style:name="T118" style:family="text">
      <style:text-properties officeooo:rsid="00940467"/>
    </style:style>
    <style:style style:name="T119" style:family="text">
      <style:text-properties fo:font-weight="bold" officeooo:rsid="00940467" style:font-weight-asian="bold" style:font-weight-complex="bold"/>
    </style:style>
    <style:style style:name="T120" style:family="text">
      <style:text-properties fo:font-weight="bold" officeooo:rsid="0099e9c6" style:font-weight-asian="bold" style:font-weight-complex="bold"/>
    </style:style>
    <style:style style:name="T121" style:family="text">
      <style:text-properties officeooo:rsid="009a3d67"/>
    </style:style>
    <style:style style:name="T122" style:family="text">
      <style:text-properties fo:font-weight="bold" officeooo:rsid="009a3d67" style:font-weight-asian="bold" style:font-weight-complex="bold"/>
    </style:style>
    <style:style style:name="T123" style:family="text">
      <style:text-properties officeooo:rsid="009e7921"/>
    </style:style>
    <style:style style:name="T124" style:family="text">
      <style:text-properties officeooo:rsid="00a03a07"/>
    </style:style>
    <style:style style:name="T125" style:family="text">
      <style:text-properties fo:font-weight="bold" officeooo:rsid="00a03a07" style:font-weight-asian="bold" style:font-weight-complex="bold"/>
    </style:style>
    <style:style style:name="T126" style:family="text">
      <style:text-properties officeooo:rsid="00a3591c"/>
    </style:style>
    <style:style style:name="T127" style:family="text">
      <style:text-properties officeooo:rsid="00a525be"/>
    </style:style>
    <style:style style:name="T128" style:family="text">
      <style:text-properties style:font-name="Liberation Serif" fo:font-size="12pt" fo:font-weight="normal" officeooo:rsid="00a59d42" style:font-size-asian="12pt" style:font-weight-asian="normal" style:font-size-complex="12pt" style:font-weight-complex="normal"/>
    </style:style>
    <style:style style:name="T129" style:family="text">
      <style:text-properties style:font-name="Liberation Serif" fo:font-size="12pt" fo:font-weight="bold" officeooo:rsid="00a59d42" style:font-size-asian="12pt" style:font-weight-asian="bold" style:font-size-complex="12pt" style:font-weight-complex="bold"/>
    </style:style>
    <style:style style:name="T130" style:family="text">
      <style:text-properties style:font-name="Liberation Serif" fo:font-size="12pt" fo:font-weight="normal" officeooo:rsid="00a68b77" style:font-size-asian="12pt" style:font-weight-asian="normal" style:font-size-complex="12pt" style:font-weight-complex="normal"/>
    </style:style>
    <style:style style:name="T131"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32" style:family="text">
      <style:text-properties fo:font-variant="normal" fo:text-transform="none" fo:color="#000000" loext:opacity="100%" style:font-name="Liberation Serif" fo:font-size="12pt" fo:letter-spacing="normal" fo:font-style="normal" fo:font-weight="normal" officeooo:rsid="00a68b77" style:font-size-asian="12pt" style:font-size-complex="12pt"/>
    </style:style>
    <style:style style:name="T133" style:family="text">
      <style:text-properties fo:font-variant="normal" fo:text-transform="none" fo:color="#000000" loext:opacity="100%" style:font-name="Liberation Serif" fo:font-size="12pt" fo:letter-spacing="normal" fo:font-style="normal" fo:font-weight="bold" officeooo:rsid="00a68b77" style:font-size-asian="12pt" style:font-weight-asian="bold" style:font-size-complex="12pt" style:font-weight-complex="bold"/>
    </style:style>
    <style:style style:name="T134" style:family="text">
      <style:text-properties fo:font-variant="normal" fo:text-transform="none" fo:color="#000000" loext:opacity="100%" style:font-name="Liberation Serif" fo:font-size="12pt" fo:letter-spacing="normal" fo:font-style="normal" fo:font-weight="normal" officeooo:rsid="00a68b77" style:font-size-asian="12pt" style:font-weight-asian="normal" style:font-size-complex="12pt" style:font-weight-complex="normal"/>
    </style:style>
    <style:style style:name="T135" style:family="text">
      <style:text-properties fo:font-variant="normal" fo:text-transform="none" fo:color="#000000" loext:opacity="100%" style:font-name="Liberation Serif" fo:font-size="12pt" fo:letter-spacing="normal" fo:font-style="normal" fo:font-weight="normal" officeooo:rsid="00a872f0" style:font-size-asian="12pt" style:font-weight-asian="normal" style:font-size-complex="12pt" style:font-weight-complex="normal"/>
    </style:style>
    <style:style style:name="T136" style:family="text">
      <style:text-properties fo:font-variant="normal" fo:text-transform="none" fo:color="#000000" loext:opacity="100%" style:font-name="Liberation Serif" fo:font-size="12pt" fo:letter-spacing="normal" fo:font-style="italic" fo:font-weight="bold" officeooo:rsid="001d730f" style:font-size-asian="12pt" style:font-style-asian="italic" style:font-weight-asian="bold" style:font-size-complex="12pt" style:font-style-complex="italic" style:font-weight-complex="bold"/>
    </style:style>
    <style:style style:name="T137" style:family="text">
      <style:text-properties fo:font-variant="normal" fo:text-transform="none" fo:color="#000000" loext:opacity="100%" style:font-name="Liberation Serif" fo:font-size="12pt" fo:letter-spacing="normal" fo:font-style="italic" fo:font-weight="bold" officeooo:rsid="00228e66" style:font-size-asian="12pt" style:font-style-asian="italic" style:font-weight-asian="bold" style:font-size-complex="12pt" style:font-style-complex="italic" style:font-weight-complex="bold"/>
    </style:style>
    <style:style style:name="T138" style:family="text">
      <style:text-properties fo:font-variant="normal" fo:text-transform="none" fo:color="#000000" loext:opacity="100%" style:font-name="Liberation Serif" fo:font-size="12pt" fo:letter-spacing="normal" fo:font-style="italic" fo:font-weight="bold" officeooo:rsid="00f048d4" style:font-size-asian="12pt" style:font-style-asian="italic" style:font-weight-asian="bold" style:font-size-complex="12pt" style:font-style-complex="italic" style:font-weight-complex="bold"/>
    </style:style>
    <style:style style:name="T139" style:family="text">
      <style:text-properties fo:font-variant="normal" fo:text-transform="none" fo:color="#000000" loext:opacity="100%" style:font-name="Liberation Serif" fo:font-size="12pt" fo:letter-spacing="normal" fo:font-style="normal" fo:font-weight="normal" officeooo:rsid="001d730f" style:font-size-asian="12pt" style:font-style-asian="normal" style:font-weight-asian="normal" style:font-size-complex="12pt" style:font-style-complex="normal" style:font-weight-complex="normal"/>
    </style:style>
    <style:style style:name="T140" style:family="text">
      <style:text-properties fo:font-variant="normal" fo:text-transform="none" fo:color="#000000" loext:opacity="100%" style:font-name="Liberation Serif" fo:font-size="12pt" fo:letter-spacing="normal" fo:font-style="normal" fo:font-weight="normal" officeooo:rsid="00f048d4" style:font-size-asian="12pt" style:font-style-asian="normal" style:font-weight-asian="normal" style:font-size-complex="12pt" style:font-style-complex="normal" style:font-weight-complex="normal"/>
    </style:style>
    <style:style style:name="T141" style:family="text">
      <style:text-properties fo:font-variant="normal" fo:text-transform="none" fo:color="#000000" loext:opacity="100%" style:font-name="Liberation Serif" fo:font-size="12pt" fo:letter-spacing="normal" fo:font-style="normal" fo:font-weight="normal" officeooo:rsid="0022d241" style:font-size-asian="12pt" style:font-style-asian="normal" style:font-weight-asian="normal" style:font-size-complex="12pt" style:font-style-complex="normal" style:font-weight-complex="normal"/>
    </style:style>
    <style:style style:name="T142" style:family="text">
      <style:text-properties fo:font-variant="normal" fo:text-transform="none" fo:color="#000000" loext:opacity="100%" style:font-name="Liberation Serif" fo:font-size="12pt" fo:letter-spacing="normal" fo:font-style="normal" fo:font-weight="normal" officeooo:rsid="00f9ade3" style:font-size-asian="12pt" style:font-style-asian="normal" style:font-weight-asian="normal" style:font-size-complex="12pt" style:font-style-complex="normal" style:font-weight-complex="normal"/>
    </style:style>
    <style:style style:name="T143" style:family="text">
      <style:text-properties fo:font-variant="normal" fo:text-transform="none" fo:color="#000000" loext:opacity="100%" style:font-name="Liberation Serif" fo:font-size="12pt" fo:letter-spacing="normal" fo:font-style="italic" fo:font-weight="normal" officeooo:rsid="001d730f" style:font-size-asian="12pt" style:font-style-asian="italic" style:font-weight-asian="normal" style:font-size-complex="12pt" style:font-style-complex="italic" style:font-weight-complex="normal"/>
    </style:style>
    <style:style style:name="T144" style:family="text">
      <style:text-properties fo:font-variant="normal" fo:text-transform="none" fo:color="#000000" loext:opacity="100%" style:font-name="Liberation Serif" fo:font-size="12pt" fo:letter-spacing="normal" fo:font-style="normal" fo:font-weight="normal" officeooo:rsid="00dfb774" style:font-size-asian="12pt" style:font-style-asian="normal" style:font-weight-asian="normal" style:font-size-complex="12pt" style:font-style-complex="normal" style:font-weight-complex="normal"/>
    </style:style>
    <style:style style:name="T145" style:family="text">
      <style:text-properties fo:font-variant="normal" fo:text-transform="none" fo:color="#000000" loext:opacity="100%" style:font-name="Liberation Serif" fo:font-size="12pt" fo:letter-spacing="normal" fo:font-style="normal" fo:font-weight="bold" officeooo:rsid="00a9e2d9" style:font-size-asian="10.5pt" style:font-style-asian="normal" style:font-weight-asian="bold" style:font-size-complex="12pt" style:font-style-complex="normal" style:font-weight-complex="bold"/>
    </style:style>
    <style:style style:name="T146" style:family="text">
      <style:text-properties fo:font-variant="normal" fo:text-transform="none" fo:color="#000000" loext:opacity="100%" style:font-name="Liberation Serif" fo:font-size="20pt" fo:letter-spacing="normal" fo:font-style="normal" fo:font-weight="bold" officeooo:rsid="00a9e2d9" style:font-size-asian="20pt" style:font-weight-asian="bold" style:font-size-complex="20pt" style:font-weight-complex="bold"/>
    </style:style>
    <style:style style:name="T147" style:family="text">
      <style:text-properties fo:font-variant="normal" fo:text-transform="none" fo:color="#000000" loext:opacity="100%" style:font-name="Liberation Serif" fo:font-size="16pt" fo:letter-spacing="normal" fo:font-style="normal" fo:font-weight="bold" officeooo:rsid="00a9e2d9" style:font-size-asian="14pt" style:font-weight-asian="bold" style:font-size-complex="16pt" style:font-weight-complex="bold"/>
    </style:style>
    <style:style style:name="T148" style:family="text">
      <style:text-properties fo:font-variant="normal" fo:text-transform="none" fo:color="#000000" loext:opacity="100%" style:font-name="Liberation Serif" fo:font-size="12pt" fo:letter-spacing="normal" fo:font-style="normal" fo:font-weight="normal" officeooo:rsid="00a9e2d9" style:font-size-asian="10.5pt" style:font-weight-asian="normal" style:font-size-complex="12pt" style:font-weight-complex="normal"/>
    </style:style>
    <style:style style:name="T149" style:family="text">
      <style:text-properties fo:font-variant="normal" fo:text-transform="none" fo:color="#000000" loext:opacity="100%" style:font-name="Liberation Serif" fo:font-size="16pt" fo:letter-spacing="normal" fo:font-style="normal" fo:font-weight="bold" officeooo:rsid="00a9e2d9" style:font-size-asian="16pt" style:font-weight-asian="bold" style:font-size-complex="16pt" style:font-weight-complex="bold"/>
    </style:style>
    <style:style style:name="T150" style:family="text">
      <style:text-properties fo:font-variant="normal" fo:text-transform="none" fo:color="#000000" loext:opacity="100%" style:font-name="Liberation Serif" fo:font-size="12pt" fo:letter-spacing="normal" fo:font-style="normal" fo:font-weight="normal" officeooo:rsid="00f048d4" style:font-size-asian="10.5pt" style:font-weight-asian="normal" style:font-size-complex="12pt" style:font-weight-complex="normal"/>
    </style:style>
    <style:style style:name="T151" style:family="text">
      <style:text-properties fo:font-variant="normal" fo:text-transform="none" fo:color="#000000" loext:opacity="100%" style:font-name="Liberation Serif" fo:font-size="12pt" fo:letter-spacing="normal" fo:font-style="normal" fo:font-weight="normal" officeooo:rsid="00abb834" style:font-size-asian="10.5pt" style:font-weight-asian="normal" style:font-size-complex="12pt" style:font-weight-complex="normal"/>
    </style:style>
    <style:style style:name="T152" style:family="text">
      <style:text-properties fo:font-variant="normal" fo:text-transform="none" fo:color="#000000" loext:opacity="100%" style:font-name="Liberation Serif" fo:font-size="12pt" fo:letter-spacing="normal" fo:font-style="normal" fo:font-weight="bold" officeooo:rsid="00abb834" style:font-size-asian="10.5pt" style:font-weight-asian="bold" style:font-size-complex="12pt" style:font-weight-complex="bold"/>
    </style:style>
    <style:style style:name="T153" style:family="text">
      <style:text-properties fo:font-variant="normal" fo:text-transform="none" fo:color="#000000" loext:opacity="100%" style:font-name="Liberation Serif" fo:font-size="20pt" fo:letter-spacing="normal" fo:font-style="normal" fo:font-weight="bold" officeooo:rsid="00ace5e7" style:font-size-asian="20pt" style:font-weight-asian="bold" style:font-size-complex="20pt" style:font-weight-complex="bold"/>
    </style:style>
    <style:style style:name="T154" style:family="text">
      <style:text-properties fo:font-variant="normal" fo:text-transform="none" fo:color="#000000" loext:opacity="100%" style:font-name="Liberation Serif" fo:font-size="12pt" fo:letter-spacing="normal" fo:font-style="normal" fo:font-weight="normal" officeooo:rsid="00ace5e7" style:font-size-asian="10.5pt" style:font-weight-asian="normal" style:font-size-complex="12pt" style:font-weight-complex="normal"/>
    </style:style>
    <style:style style:name="T155" style:family="text">
      <style:text-properties fo:font-variant="normal" fo:text-transform="none" fo:color="#000000" loext:opacity="100%" style:font-name="Liberation Serif" fo:font-size="16pt" fo:letter-spacing="normal" fo:font-style="normal" fo:font-weight="bold" officeooo:rsid="00b794f8" style:font-size-asian="16pt" style:font-weight-asian="bold" style:font-size-complex="16pt" style:font-weight-complex="bold"/>
    </style:style>
    <style:style style:name="T156" style:family="text">
      <style:text-properties fo:font-variant="normal" fo:text-transform="none" fo:color="#000000" loext:opacity="100%" style:font-name="Liberation Serif" fo:font-size="12pt" fo:letter-spacing="normal" fo:font-style="normal" fo:font-weight="normal" officeooo:rsid="00ad9b1a" style:font-size-asian="12pt" style:font-weight-asian="normal" style:font-size-complex="12pt" style:font-weight-complex="normal"/>
    </style:style>
    <style:style style:name="T157" style:family="text">
      <style:text-properties fo:font-variant="normal" fo:text-transform="none" fo:color="#000000" loext:opacity="100%" style:font-name="Liberation Serif" fo:font-size="12pt" fo:letter-spacing="normal" fo:font-style="normal" fo:font-weight="normal" officeooo:rsid="00ace5e7" style:font-size-asian="12pt" style:font-weight-asian="normal" style:font-size-complex="12pt" style:font-weight-complex="normal"/>
    </style:style>
    <style:style style:name="T158" style:family="text">
      <style:text-properties fo:font-variant="normal" fo:text-transform="none" fo:color="#000000" loext:opacity="100%" style:font-name="Liberation Serif" fo:font-size="12pt" fo:letter-spacing="normal" fo:font-style="normal" fo:font-weight="normal" officeooo:rsid="00af09c5" style:font-size-asian="12pt" style:font-weight-asian="normal" style:font-size-complex="12pt" style:font-weight-complex="normal"/>
    </style:style>
    <style:style style:name="T159" style:family="text">
      <style:text-properties fo:font-variant="normal" fo:text-transform="none" fo:color="#000000" loext:opacity="100%" style:font-name="Liberation Serif" fo:font-size="12pt" fo:letter-spacing="normal" fo:font-style="normal" fo:font-weight="normal" officeooo:rsid="00b06658" style:font-size-asian="12pt" style:font-weight-asian="normal" style:font-size-complex="12pt" style:font-weight-complex="normal"/>
    </style:style>
    <style:style style:name="T160" style:family="text">
      <style:text-properties fo:font-variant="normal" fo:text-transform="none" fo:color="#000000" loext:opacity="100%" style:font-name="Liberation Serif" fo:font-size="12pt" fo:letter-spacing="normal" fo:font-style="normal" fo:font-weight="normal" officeooo:rsid="00af09c5" fo:background-color="#88cb50" loext:char-shading-value="0" style:font-size-asian="12pt" style:font-weight-asian="normal" style:font-size-complex="12pt" style:font-weight-complex="normal"/>
    </style:style>
    <style:style style:name="T161" style:family="text">
      <style:text-properties fo:font-variant="normal" fo:text-transform="none" fo:color="#000000" loext:opacity="100%" style:font-name="Liberation Serif" fo:letter-spacing="normal" fo:font-weight="normal" officeooo:rsid="00af09c5" fo:background-color="#88cb50" loext:char-shading-value="0" style:font-size-asian="12pt" style:font-weight-asian="normal" style:font-weight-complex="normal"/>
    </style:style>
    <style:style style:name="T162" style:family="text">
      <style:text-properties officeooo:rsid="00b80ecb"/>
    </style:style>
    <style:style style:name="T163" style:family="text">
      <style:text-properties officeooo:rsid="00c2cc14"/>
    </style:style>
    <style:style style:name="T164" style:family="text">
      <style:text-properties officeooo:rsid="00b2188d"/>
    </style:style>
    <style:style style:name="T165" style:family="text">
      <style:text-properties officeooo:rsid="00bf94aa"/>
    </style:style>
    <style:style style:name="T166" style:family="text">
      <style:text-properties officeooo:rsid="0028dbfd"/>
    </style:style>
    <style:style style:name="T167" style:family="text">
      <style:text-properties officeooo:rsid="00b67e56"/>
    </style:style>
    <style:style style:name="T168" style:family="text">
      <style:text-properties fo:background-color="#378bd0" loext:char-shading-value="0"/>
    </style:style>
    <style:style style:name="T169" style:family="text">
      <style:text-properties officeooo:rsid="007357f2" fo:background-color="#378bd0" loext:char-shading-value="0"/>
    </style:style>
    <style:style style:name="T170" style:family="text">
      <style:text-properties officeooo:rsid="00af09c5" fo:background-color="#378bd0" loext:char-shading-value="0"/>
    </style:style>
    <style:style style:name="T171" style:family="text">
      <style:text-properties officeooo:rsid="00af09c5"/>
    </style:style>
    <style:style style:name="T172" style:family="text">
      <style:text-properties officeooo:rsid="0033617b"/>
    </style:style>
    <style:style style:name="T173" style:family="text">
      <style:text-properties officeooo:rsid="007357f2"/>
    </style:style>
    <style:style style:name="T174" style:family="text">
      <style:text-properties officeooo:rsid="00344542"/>
    </style:style>
    <style:style style:name="T175" style:family="text">
      <style:text-properties officeooo:rsid="002b8051"/>
    </style:style>
    <style:style style:name="T176" style:family="text">
      <style:text-properties officeooo:rsid="0027c80a"/>
    </style:style>
    <style:style style:name="T177" style:family="text">
      <style:text-properties fo:font-style="italic" officeooo:rsid="00bf94aa" style:font-style-asian="italic" style:font-style-complex="italic"/>
    </style:style>
    <style:style style:name="T178" style:family="text">
      <style:text-properties fo:font-variant="normal" fo:text-transform="none" fo:color="#000000" loext:opacity="100%" style:font-name="Liberation Serif" fo:font-size="16pt" fo:letter-spacing="normal" fo:font-style="normal" fo:font-weight="bold" officeooo:rsid="00b2188d" style:font-size-asian="16pt" style:font-weight-asian="bold" style:font-size-complex="16pt" style:font-weight-complex="bold"/>
    </style:style>
    <style:style style:name="T179" style:family="text">
      <style:text-properties fo:font-variant="normal" fo:text-transform="none" fo:color="#000000" loext:opacity="100%" style:font-name="Liberation Serif" fo:font-size="12pt" fo:letter-spacing="normal" fo:font-style="normal" fo:font-weight="normal" officeooo:rsid="00b67e56" style:font-size-asian="10.5pt" style:font-weight-asian="normal" style:font-size-complex="12pt" style:font-weight-complex="normal"/>
    </style:style>
    <style:style style:name="T180" style:family="text">
      <style:text-properties fo:font-variant="normal" fo:text-transform="none" fo:color="#000000" loext:opacity="100%" style:font-name="Liberation Serif" fo:font-size="12pt" fo:letter-spacing="normal" fo:font-style="normal" fo:font-weight="normal" officeooo:rsid="00c15725" style:font-size-asian="10.5pt" style:font-weight-asian="normal" style:font-size-complex="12pt" style:font-weight-complex="normal"/>
    </style:style>
    <style:style style:name="T181" style:family="text">
      <style:text-properties fo:font-variant="normal" fo:text-transform="none" fo:color="#000000" loext:opacity="100%" style:font-name="Liberation Serif" fo:font-size="12pt" fo:letter-spacing="normal" fo:font-style="italic" fo:font-weight="normal" officeooo:rsid="00c15725" style:font-size-asian="10.5pt" style:font-style-asian="italic" style:font-weight-asian="normal" style:font-size-complex="12pt" style:font-style-complex="italic" style:font-weight-complex="normal"/>
    </style:style>
    <style:style style:name="T182" style:family="text">
      <style:text-properties fo:font-variant="normal" fo:text-transform="none" fo:color="#000000" loext:opacity="100%" style:font-name="Liberation Serif" fo:font-size="12pt" fo:letter-spacing="normal" fo:font-style="normal" fo:font-weight="normal" officeooo:rsid="00b794f8" style:font-size-asian="12pt" style:font-weight-asian="normal" style:font-size-complex="12pt" style:font-weight-complex="normal"/>
    </style:style>
    <style:style style:name="T183" style:family="text">
      <style:text-properties fo:font-variant="normal" fo:text-transform="none" fo:color="#000000" loext:opacity="100%" style:font-name="Liberation Serif" fo:font-size="16pt" fo:letter-spacing="normal" fo:font-style="normal" fo:font-weight="bold" officeooo:rsid="00c2cc14" style:font-size-asian="16pt" style:font-weight-asian="bold" style:font-size-complex="16pt" style:font-weight-complex="bold"/>
    </style:style>
    <style:style style:name="T184" style:family="text">
      <style:text-properties fo:font-variant="normal" fo:text-transform="none" fo:color="#000000" loext:opacity="100%" style:font-name="Liberation Serif" fo:font-size="16pt" fo:letter-spacing="normal" fo:font-style="normal" fo:font-weight="bold" officeooo:rsid="00251c23" style:font-size-asian="16pt" style:font-style-asian="normal" style:font-weight-asian="bold" style:font-size-complex="16pt" style:font-style-complex="normal" style:font-weight-complex="bold"/>
    </style:style>
    <style:style style:name="T185" style:family="text">
      <style:text-properties fo:font-variant="normal" fo:text-transform="none" fo:color="#000000" loext:opacity="100%" style:font-name="Liberation Serif" fo:font-size="12pt" fo:letter-spacing="normal" fo:font-weight="normal" officeooo:rsid="00c2cc14" style:font-size-asian="10.5pt" style:font-weight-asian="normal" style:font-size-complex="12pt" style:font-weight-complex="normal"/>
    </style:style>
    <style:style style:name="T186" style:family="text">
      <style:text-properties fo:font-variant="normal" fo:text-transform="none" fo:color="#000000" loext:opacity="100%" style:font-name="Liberation Serif" fo:font-size="12pt" fo:letter-spacing="normal" fo:font-weight="bold" officeooo:rsid="00cc3980" style:font-size-asian="10.5pt" style:font-weight-asian="bold" style:font-size-complex="12pt" style:font-weight-complex="bold"/>
    </style:style>
    <style:style style:name="T187" style:family="text">
      <style:text-properties fo:font-variant="normal" fo:text-transform="none" fo:color="#000000" loext:opacity="100%" style:font-name="Liberation Serif" fo:font-size="12pt" fo:letter-spacing="normal" fo:font-weight="normal" officeooo:rsid="00c3f9a1" style:font-size-asian="10.5pt" style:font-weight-asian="normal" style:font-size-complex="12pt" style:font-weight-complex="normal"/>
    </style:style>
    <style:style style:name="T188" style:family="text">
      <style:text-properties fo:font-variant="normal" fo:text-transform="none" fo:color="#000000" loext:opacity="100%" style:font-name="Liberation Serif" fo:font-size="12pt" fo:letter-spacing="normal" fo:font-weight="normal" officeooo:rsid="00dfc443" style:font-size-asian="10.5pt" style:font-weight-asian="normal" style:font-size-complex="12pt" style:font-weight-complex="normal"/>
    </style:style>
    <style:style style:name="T189" style:family="text">
      <style:text-properties fo:font-variant="normal" fo:text-transform="none" fo:color="#000000" loext:opacity="100%" style:font-name="Liberation Serif" fo:font-size="12pt" fo:letter-spacing="normal" fo:font-weight="normal" officeooo:rsid="00c58bf7" style:font-size-asian="10.5pt" style:font-weight-asian="normal" style:font-size-complex="12pt" style:font-weight-complex="normal"/>
    </style:style>
    <style:style style:name="T190" style:family="text">
      <style:text-properties fo:font-variant="normal" fo:text-transform="none" fo:color="#000000" loext:opacity="100%" style:font-name="Liberation Serif" fo:font-size="12pt" fo:letter-spacing="normal" fo:font-weight="normal" officeooo:rsid="00c6ed73" style:font-size-asian="10.5pt" style:font-weight-asian="normal" style:font-size-complex="12pt" style:font-weight-complex="normal"/>
    </style:style>
    <style:style style:name="T191" style:family="text">
      <style:text-properties fo:font-variant="normal" fo:text-transform="none" fo:color="#000000" loext:opacity="100%" style:font-name="Liberation Serif" fo:font-size="12pt" fo:letter-spacing="normal" fo:font-style="italic" fo:font-weight="normal" officeooo:rsid="00c6ed73" style:font-size-asian="10.5pt" style:font-style-asian="italic" style:font-weight-asian="normal" style:font-size-complex="12pt" style:font-style-complex="italic" style:font-weight-complex="normal"/>
    </style:style>
    <style:style style:name="T192" style:family="text">
      <style:text-properties fo:font-variant="normal" fo:text-transform="none" fo:color="#000000" loext:opacity="100%" style:font-name="Liberation Serif" fo:font-size="12pt" fo:letter-spacing="normal" fo:font-weight="normal" officeooo:rsid="00c8e40c" style:font-size-asian="10.5pt" style:font-weight-asian="normal" style:font-size-complex="12pt" style:font-weight-complex="normal"/>
    </style:style>
    <style:style style:name="T193" style:family="text">
      <style:text-properties fo:font-variant="normal" fo:text-transform="none" fo:color="#ff0000" loext:opacity="100%" style:font-name="Liberation Serif" fo:font-size="12pt" fo:letter-spacing="normal" fo:font-weight="normal" officeooo:rsid="00c6ed73" style:font-size-asian="10.5pt" style:font-weight-asian="normal" style:font-size-complex="12pt" style:font-weight-complex="normal"/>
    </style:style>
    <style:style style:name="T194" style:family="text">
      <style:text-properties fo:font-variant="normal" fo:text-transform="none" fo:color="#000000" loext:opacity="100%" style:font-name="Liberation Serif" fo:font-size="12pt" fo:letter-spacing="normal" fo:font-weight="normal" officeooo:rsid="00ca685e" style:font-size-asian="10.5pt" style:font-weight-asian="normal" style:font-size-complex="12pt" style:font-weight-complex="normal"/>
    </style:style>
    <style:style style:name="T195" style:family="text">
      <style:text-properties fo:font-variant="normal" fo:text-transform="none" fo:color="#000000" loext:opacity="100%" style:font-name="Liberation Serif" fo:font-size="12pt" fo:letter-spacing="normal" fo:font-weight="normal" officeooo:rsid="00cbaad9" style:font-size-asian="10.5pt" style:font-weight-asian="normal" style:font-size-complex="12pt" style:font-weight-complex="normal"/>
    </style:style>
    <style:style style:name="T196" style:family="text">
      <style:text-properties fo:font-variant="normal" fo:text-transform="none" fo:color="#000000" loext:opacity="100%" style:font-name="Liberation Serif" fo:font-size="12pt" fo:letter-spacing="normal" fo:font-weight="bold" officeooo:rsid="00cc3980" style:font-size-asian="12pt" style:font-weight-asian="bold" style:font-size-complex="12pt" style:font-weight-complex="bold"/>
    </style:style>
    <style:style style:name="T197" style:family="text">
      <style:text-properties fo:font-variant="normal" fo:text-transform="none" fo:color="#000000" loext:opacity="100%" style:font-name="Liberation Serif" fo:font-size="12pt" fo:letter-spacing="normal" fo:font-weight="normal" officeooo:rsid="00cc3980" style:font-size-asian="10.5pt" style:font-weight-asian="normal" style:font-size-complex="12pt" style:font-weight-complex="normal"/>
    </style:style>
    <style:style style:name="T198" style:family="text">
      <style:text-properties fo:font-variant="normal" fo:text-transform="none" fo:color="#000000" loext:opacity="100%" style:font-name="Liberation Serif" fo:font-size="12pt" fo:letter-spacing="normal" fo:font-weight="normal" officeooo:rsid="00cd4b62" style:font-size-asian="10.5pt" style:font-weight-asian="normal" style:font-size-complex="12pt" style:font-weight-complex="normal"/>
    </style:style>
    <style:style style:name="T199" style:family="text">
      <style:text-properties fo:font-variant="normal" fo:text-transform="none" fo:color="#000000" loext:opacity="100%" style:font-name="Liberation Serif" fo:font-size="12pt" fo:letter-spacing="normal" fo:font-weight="normal" officeooo:rsid="00cc6412" style:font-size-asian="10.5pt" style:font-weight-asian="normal" style:font-size-complex="12pt" style:font-weight-complex="normal"/>
    </style:style>
    <style:style style:name="T200" style:family="text">
      <style:text-properties fo:font-variant="normal" fo:text-transform="none" fo:color="#000000" loext:opacity="100%" style:font-name="Liberation Serif" fo:font-size="12pt" fo:letter-spacing="normal" fo:font-weight="normal" officeooo:rsid="00d15f43" style:font-size-asian="10.5pt" style:font-weight-asian="normal" style:font-size-complex="12pt" style:font-weight-complex="normal"/>
    </style:style>
    <style:style style:name="T201" style:family="text">
      <style:text-properties officeooo:rsid="00e45d2e"/>
    </style:style>
    <style:style style:name="T202" style:family="text">
      <style:text-properties fo:font-variant="normal" fo:text-transform="none" fo:color="#000000" loext:opacity="100%" style:font-name="Liberation Serif" fo:letter-spacing="normal" fo:font-weight="bold" officeooo:rsid="004b4046" style:font-size-asian="12pt" style:font-weight-asian="bold" style:font-weight-complex="bold"/>
    </style:style>
    <style:style style:name="T203" style:family="text">
      <style:text-properties fo:font-variant="normal" fo:text-transform="none" fo:color="#000000" loext:opacity="100%" style:font-name="Liberation Serif" fo:letter-spacing="normal" style:font-size-asian="12pt"/>
    </style:style>
    <style:style style:name="T204" style:family="text">
      <style:text-properties officeooo:rsid="00e5892c"/>
    </style:style>
    <style:style style:name="T205" style:family="text">
      <style:text-properties officeooo:rsid="00eaba23"/>
    </style:style>
    <style:style style:name="T206" style:family="text">
      <style:text-properties officeooo:rsid="00eb8b3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vg:stroke-width="0.0402in" svg:stroke-color="#ff0000" draw:marker-start-width="0.2in" draw:marker-end-width="0.2in" draw:opacity="0%" draw:textarea-horizontal-align="justify" draw:textarea-vertical-align="middle" draw:auto-grow-height="false" fo:min-height="0.1728in" fo:min-width="0.6846in"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width="0.2in" draw:fill="solid" draw:fill-color="#729fcf" draw:opacity="0%" draw:textarea-horizontal-align="justify" draw:textarea-vertical-align="middle" draw:auto-grow-height="false" fo:min-height="0.3583in" fo:min-width="0.452in"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SpiritForm<text:span text:style-name="T1">s</text:span> 1.0</text:p>
      <text:p text:style-name="P3"/>
      <text:p text:style-name="P3"/>
      <text:p text:style-name="P3"/>
      <text:p text:style-name="P3">User Manual</text:p>
      <text:p text:style-name="P4"><text:span text:style-name="T2">Jan</text:span>. 202<text:span text:style-name="T2">6</text:span></text:p>
      <text:p text:style-name="P5"/>
      <text:p text:style-name="P5"/>
      <text:p text:style-name="P5"/>
      <text:p text:style-name="P5">SpiritForm<text:span text:style-name="T1">s</text:span> was written with Paranormal Investigators <text:span text:style-name="T3">and their clients</text:span> in mind. Team members need a central location where they can collaborate, share information, <text:span text:style-name="T4">and </text:span>record <text:span text:style-name="T5">the </text:span>results of their investigations. And clients need an easy way to have <text:span text:style-name="T3">immediate access</text:span> to the investigation data and final reports. <text:s/>SpiritForm<text:span text:style-name="T1">s</text:span> gives them just that - direct access. <text:span text:style-name="T6">All the time. </text:span><text:span text:style-name="T7">Anytime</text:span><text:span text:style-name="T6">.</text:span> </text:p>
      <text:p text:style-name="P5"/>
      <text:p text:style-name="P6">In a hosted environment, globeadmin (superuser) and Team Members can log in and create new <text:span text:style-name="T8">investigations</text:span>, add details, view reports, and send emails. Clients can log in, view their <text:span text:style-name="T8">case investigations </text:span>data, export and download <text:span text:style-name="T9">it</text:span>, and also view and download completed Reports. </text:p>
      <text:p text:style-name="P5"/>
      <text:p text:style-name="P7">This user manual assumes that you have completed ALL steps in the SpiritForm<text:span text:style-name="T1">s</text:span> 1.0 Installation Manual. If you have <text:span text:style-name="T10">not</text:span> done so, <text:span text:style-name="T10">please </text:span>do it <text:span text:style-name="T10">now</text:span>. </text:p>
      <text:p text:style-name="P5"/>
      <text:p text:style-name="P5"/>
      <text:p text:style-name="P5"/>
      <text:p text:style-name="P5"/>
      <text:p text:style-name="P5"/>
      <text:p text:style-name="P5"><draw:frame draw:style-name="fr1" draw:name="Image1" text:anchor-type="char" svg:width="1.3346in" svg:height="1.3346in" draw:z-index="0"><draw:image xlink:href="Pictures/1000000000000258000002582A4566DB.jpg" xlink:type="simple" xlink:show="embed" xlink:actuate="onLoad" draw: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Key Concepts</text:p>
      <text:p text:style-name="P9"/>
      <text:p text:style-name="P9"><text:span text:style-name="Strong_20_Emphasis">Case</text:span>: A named situation or location (e.g., “Smith Residence”) </text:p>
      <text:p text:style-name="P9"><text:span text:style-name="Strong_20_Emphasis">Investigation</text:span>: A single visit or session related to a case </text:p>
      <text:p text:style-name="P9"><text:span text:style-name="Strong_20_Emphasis">Case Investigation #</text:span>: The sequence number of an investigation within a case </text:p>
      <text:p text:style-name="P9"><text:span text:style-name="Strong_20_Emphasis">Investigation #</text:span>: The global, system-wide investigation identifier </text:p>
      <text:p text:style-name="P10"/>
      <text:p text:style-name="P10">Requirements:</text:p>
      <text:p text:style-name="P11"/>
      <text:p text:style-name="P12">There are just two user requirements to use SpiritForms:</text:p>
      <text:p text:style-name="P12"/>
      <text:p text:style-name="P12">1. Google Chrome browser</text:p>
      <text:p text:style-name="P12">2. custom Chrome extension: ‘<text:span text:style-name="T11">Capture Page Chrome Extension’</text:span> <text:span text:style-name="T12">(for downloading Reports). </text:span><text:span text:style-name="T11">Please see the README.txt file included in the .zip file for complete instructions for installing this extension. </text:span><text:span text:style-name="T13">It is recommended that all users (especially clients) read the instructions and install the extension.</text:span></text:p>
      <text:p text:style-name="P12">The Chrome extension is <text:span text:style-name="Strong_20_Emphasis">only required for downloading reports as ZIP files</text:span>. Reports can still be viewed in the browser without the extension. </text:p>
      <text:p text:style-name="P13"/>
      <text:p text:style-name="P13">Users</text:p>
      <text:p text:style-name="P14"/>
      <text:p text:style-name="P15">globeadmin</text:p>
      <text:p text:style-name="P14"/>
      <text:p text:style-name="P16">Upon installation of nuBuilder Forte 4.9.2, a ‘master user’ called ‘globeadmin’ is created. This user has access to <text:span text:style-name="T3">everything in </text:span><text:span text:style-name="T14">nuBuilder </text:span><text:span text:style-name="T15">and</text:span><text:span text:style-name="T14"> </text:span><text:span text:style-name="T16">has access </text:span><text:span text:style-name="T14">to </text:span><text:span text:style-name="T3">everything</text:span><text:span text:style-name="T14"> </text:span><text:span text:style-name="T3">in the SpiritForm</text:span><text:span text:style-name="T17">s</text:span><text:span text:style-name="T3"> application. </text:span><text:span text:style-name="T18">g</text:span><text:span text:style-name="T19">lobeadmin </text:span><text:span text:style-name="T20">in nuBuilder </text:span><text:span text:style-name="T19">is </text:span><text:span text:style-name="T20">considered </text:span><text:span text:style-name="T19">equivalent to ‘God Mode’ on a Windows computer.</text:span></text:p>
      <text:p text:style-name="P17"/>
      <text:p text:style-name="P18"><text:span text:style-name="T21">***</text:span><text:span text:style-name="T22">WARNING TO GLOBEADMIN USER</text:span>:<text:span text:style-name="T23">***</text:span></text:p>
      <text:p text:style-name="P18"><text:s/>Unless you know exactly what you are doing (at a programming level), <text:span text:style-name="T24">DO NOT CHANGE ACCESS LEVELS OR ACCESS LEVEL SETTINGS for ANY USER.</text:span> Doing so can create instability and or break functionality for those users.</text:p>
      <text:p text:style-name="P19"/>
      <text:p text:style-name="P20"><draw:frame draw:style-name="fr2" draw:name="Image2" text:anchor-type="char" svg:x="0.0043in" svg:y="0.0134in" svg:width="3.2634in" svg:height="2.698in" draw:z-index="1"><draw:image xlink:href="Pictures/100000010000040D00000334ACEA8EA1.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text:soft-page-break/>‘access1’ Access Level (Clients only)</text:p>
      <text:p text:style-name="P21"/>
      <text:p text:style-name="P21">‘<text:span text:style-name="T24">access1</text:span>’ Access Level in nuBuilder allows clients to <text:span text:style-name="T25">1) </text:span>login, <text:span text:style-name="T25">2) </text:span>view their <text:span text:style-name="T26">case investigation</text:span>(s) information, <text:span text:style-name="T25">3) </text:span>export all the <text:span text:style-name="T27">investigation</text:span>(s) data to their computer, and <text:span text:style-name="T25">4) </text:span>view &amp; download their completed Reports. </text:p>
      <text:p text:style-name="P22"><text:s/></text:p>
      <text:p text:style-name="P22">Creating Client Users </text:p>
      <text:p text:style-name="P23"/>
      <text:p text:style-name="P24"><text:span text:style-name="T28">W</text:span><text:span text:style-name="T29">hen creating </text:span><text:span text:style-name="T30">new </text:span><text:span text:style-name="T29">‘Client’ users </text:span><text:span text:style-name="T30">(</text:span><text:span text:style-name="T31">done </text:span><text:span text:style-name="T32">by </text:span><text:span text:style-name="T33">globeadmin only</text:span><text:span text:style-name="T30">)</text:span><text:span text:style-name="T29">, you </text:span><text:span text:style-name="T34">must</text:span><text:span text:style-name="T29"> assign them Access Level <text:s/>‘</text:span><text:span text:style-name="T35">acc</text:span><text:span text:style-name="T36">ess1</text:span><text:span text:style-name="T37">’. </text:span><text:span text:style-name="T38">No exceptions. </text:span></text:p>
      <text:p text:style-name="P25"/>
      <text:p text:style-name="P26"><text:span text:style-name="T3">Full Name, Login Name, Access Level and Code are </text:span><text:span text:style-name="T39">all </text:span><text:span text:style-name="T22">required</text:span><text:span text:style-name="T3">.</text:span> If left blank, <text:span text:style-name="T40">the </text:span>Code <text:span text:style-name="T40">field </text:span>will automatically be populated with the Login Name as the Code. <text:span text:style-name="T41">Although the nuBuilder user interface does not explicitly require ‘</text:span><text:span text:style-name="T42">Position</text:span><text:span text:style-name="T41">’ </text:span><text:span text:style-name="T43">or ‘</text:span><text:span text:style-name="T44">Email</text:span><text:span text:style-name="T43">’ </text:span><text:span text:style-name="T41">to be populated for saving the new user record, </text:span><text:span text:style-name="T43">they are both</text:span><text:span text:style-name="T41"> </text:span><text:span text:style-name="T45">required field</text:span><text:span text:style-name="T46">s</text:span><text:span text:style-name="T45"> for Email functionality in SpiritForm</text:span><text:span text:style-name="T47">s</text:span><text:span text:style-name="T41">. You </text:span><text:span text:style-name="T48">must enter </text:span><text:span text:style-name="T46">C</text:span><text:span text:style-name="T45">lient</text:span><text:span text:style-name="T48"> </text:span><text:span text:style-name="T41">as the Position for </text:span><text:span text:style-name="T45">all</text:span><text:span text:style-name="T41"> new Clients </text:span><text:span text:style-name="T49">and you must also enter their </text:span><text:span text:style-name="T50">email address</text:span><text:span text:style-name="T49">. </text:span><text:span text:style-name="T51">When entering the email address, do NOT enable the Send welcome email checkbox. </text:span><text:span text:style-name="T52">This nuBuilder functionality is not </text:span><text:span text:style-name="T53">used. </text:span><text:span text:style-name="T54">See ‘Sending Email’ later in this guide.</text:span></text:p>
      <text:p text:style-name="P26"/>
      <text:p text:style-name="P27">‘Admin’ Access Level (Team Members)</text:p>
      <text:p text:style-name="P28"/>
      <text:p text:style-name="P29"><text:span text:style-name="T55">Consider ‘</text:span><text:span text:style-name="T56">Admin’ </text:span><text:span text:style-name="T55">Access Level a ‘Team Member’ access level. </text:span><text:span text:style-name="T57">You must assign </text:span><text:span text:style-name="T58">the </text:span><text:span text:style-name="T57">‘</text:span><text:span text:style-name="T58">Admin’ Access Level </text:span><text:span text:style-name="T57">to any new Team Member. </text:span>This access level allows <text:span text:style-name="T59">access to </text:span><text:span text:style-name="T60">some</text:span><text:span text:style-name="T59"> things</text:span> that the globeadmin user <text:span text:style-name="T61">can do, </text:span><text:span text:style-name="T59">but </text:span><text:span text:style-name="T62">not all</text:span>:</text:p>
      <text:p text:style-name="P29"/>
      <text:p text:style-name="P30"><text:span text:style-name="T63">1. Admin level users (or any other user besides globeadmin) cannot upload files to the application. </text:span><text:span text:style-name="T64">Their access to Tiny File Manager (the file upload and management tool) </text:span><text:span text:style-name="T65">is locked and prevents this. </text:span><text:span text:style-name="T66">This is a built-in nuBuilder constraint. </text:span><text:span text:style-name="T67">(See ‘</text:span><text:span text:style-name="T68">User Access to Tiny File Manager (Advanced / High-Risk)’ . </text:span><text:span text:style-name="T69">The</text:span><text:span text:style-name="T70"> </text:span><text:span text:style-name="T69">reason for</text:span><text:span text:style-name="T70"> </text:span><text:span text:style-name="T69">blocking Admin level users from Tiny File Manager is to protect </text:span>data integrity, <text:span text:style-name="T71">establish </text:span>audit control, <text:span text:style-name="T71">and provide </text:span>consistency <text:span text:style-name="T71">across the application.</text:span></text:p>
      <text:p text:style-name="P29"/>
      <text:p text:style-name="P31">2. Admin level users do not have access to <text:span text:style-name="T72">the Report Editor tab</text:span>. Why? Because <text:span text:style-name="T55">by nuBuilder design, </text:span>they don’t have access to <text:s/>Tiny File Manager. Without access to the files in Tiny File Manager, they cannot insert multimedia into <text:span text:style-name="T55">SpiritForm</text:span><text:span text:style-name="T73">s</text:span><text:span text:style-name="T55"> </text:span>Reports. <text:span text:style-name="T74">Admin level users can only </text:span><text:span text:style-name="T75">view</text:span><text:span text:style-name="T74"> </text:span><text:span text:style-name="T55">SpiritForm</text:span><text:span text:style-name="T73">s</text:span><text:span text:style-name="T55"> </text:span><text:span text:style-name="T74">reports.</text:span></text:p>
      <text:p text:style-name="P26"/>
      <text:p text:style-name="P32">3. Admin level users do not have access to User creation or maintenance. <text:span text:style-name="T74">Only globeadmin has access. </text:span><text:span text:style-name="T71">This is a security precuation.</text:span></text:p>
      <text:p text:style-name="P32"/>
      <text:p text:style-name="P33">4. Admin level users do not have access to ‘Email Manage<text:span text:style-name="T74">r’ </text:span><text:span text:style-name="T76">(mass delete of emails)</text:span> of SpiritForm<text:span text:style-name="T73">s</text:span>. Only globeadmin has access. <text:span text:style-name="T74">That is by design. They </text:span><text:span text:style-name="T77">can</text:span><text:span text:style-name="T74">, however </text:span><text:span text:style-name="T78">create and send</text:span><text:span text:style-name="T74"> emails.</text:span></text:p>
      <text:p text:style-name="P33"/>
      <text:p text:style-name="P34">5. Admin level users do not have access to ANY nuBuilder form creation or editing or any other ‘superuser’ functionality. <text:span text:style-name="T71">This is by inherent nuBuilder design and is established for security purposes.</text:span></text:p>
      <text:p text:style-name="P26"/>
      <text:p text:style-name="P35"/>
      <text:p text:style-name="P36"/>
      <text:p text:style-name="P37"><text:soft-page-break/></text:p>
      <text:p text:style-name="P38"/>
      <text:p text:style-name="P39"><text:span text:style-name="T79">A</text:span>dding a New <text:span text:style-name="T27">Investigation</text:span></text:p>
      <text:p text:style-name="P40"/>
      <text:p text:style-name="P40">When a user clicks on the plus sign to add a new <text:span text:style-name="T27">Investigation</text:span>, they are taken to the first tab (‘Location and Contact’) of the Edit form. </text:p>
      <text:p text:style-name="P40"/>
      <text:p text:style-name="P41">Location and Contact Tab</text:p>
      <text:p text:style-name="P41"/>
      <text:p text:style-name="P42">Case Name</text:p>
      <text:p text:style-name="P43"/>
      <text:p text:style-name="P44">If entering a new case name, type the name. If you are entering a new investigation regarding an existing case, then select the appropriate case name from the <text:span text:style-name="T24">Select an Existing Case</text:span> drop-down.</text:p>
      <text:h text:style-name="P45" text:outline-level="2"><text:span text:style-name="Strong_20_Emphasis"><text:span text:style-name="T80">Edit Case Name</text:span></text:span><text:span text:style-name="Strong_20_Emphasis"><text:span text:style-name="T81"> (What this means)</text:span></text:span></text:h>
      <text:p text:style-name="P46"><text:span text:style-name="T82">If you accidentally selected the wrong Case Name when creating the investigation record (and </text:span>the <text:span text:style-name="T82">correct</text:span> Case Name already exists in the drop-down list<text:span text:style-name="T82">)</text:span>, then simply select the correct case name from the drop-down and save the record. The internal associated Case Name ID will be automatically applied.</text:p>
      <text:p text:style-name="P47">In some situations, however, you may realize that an existing <text:span text:style-name="T83">investigation </text:span>record actually represent<text:span text:style-name="T83">s</text:span> a <text:span text:style-name="Strong_20_Emphasis">different case </text:span><text:span text:style-name="Strong_20_Emphasis"><text:span text:style-name="T84">that does not already exist in the drop-down.</text:span></text:span> </text:p>
      <text:p text:style-name="P47">The <text:span text:style-name="Strong_20_Emphasis">“</text:span><text:span text:style-name="Strong_20_Emphasis"><text:span text:style-name="T85">Edit Case Name</text:span></text:span><text:span text:style-name="Strong_20_Emphasis">”</text:span> option exists for exactly that reason.</text:p>
      <text:h text:style-name="P48" text:outline-level="3"><text:span text:style-name="Strong_20_Emphasis">When to use it</text:span></text:h>
      <text:p text:style-name="P47">Use this option <text:span text:style-name="Strong_20_Emphasis">only for existing records</text:span> when:</text:p>
      <text:list text:style-name="L1">
        <text:list-item>
          <text:p text:style-name="P49">A Case Name was entered incorrectly</text:p>
        </text:list-item>
        <text:list-item>
          <text:p text:style-name="P49">A record was accidentally linked to the wrong case</text:p>
        </text:list-item>
        <text:list-item>
          <text:p text:style-name="P49">An investigation should be reassigned as a separate case</text:p>
        </text:list-item>
        <text:list-item>
          <text:p text:style-name="P49"><text:span text:style-name="Strong_20_Emphasis">The desired Case Name did not already exist in the Case Name drop-down, but an existing case was accidentally selected and the record was already saved</text:span></text:p>
        </text:list-item>
      </text:list>
      <text:h text:style-name="P48" text:outline-level="3"><text:span text:style-name="Strong_20_Emphasis">How it works</text:span></text:h>
      <text:list text:style-name="L2">
        <text:list-item>
          <text:p text:style-name="P50">Check <text:span text:style-name="Strong_20_Emphasis"><text:span text:style-name="T85">Edit Case Name</text:span></text:span></text:p>
        </text:list-item>
        <text:list-item>
          <text:p text:style-name="P50">Edit the Case Name as needed</text:p>
        </text:list-item>
        <text:list-item>
          <text:p text:style-name="P50">Save the record</text:p>
        </text:list-item>
      </text:list>
      <text:p text:style-name="P47">When saved, the system will:</text:p>
      <text:list text:style-name="L3">
        <text:list-item>
          <text:p text:style-name="P51">Assign a <text:span text:style-name="Strong_20_Emphasis">new internal case identity</text:span> to the record</text:p>
        </text:list-item>
        <text:list-item>
          <text:p text:style-name="P51">Detach it from the previously selected case</text:p>
        </text:list-item>
        <text:list-item>
          <text:p text:style-name="P51"><text:soft-page-break/>Treat the edited Case Name as a <text:span text:style-name="Strong_20_Emphasis">new, independent case</text:span></text:p>
        </text:list-item>
      </text:list>
      <text:h text:style-name="P48" text:outline-level="3"><text:span text:style-name="Strong_20_Emphasis">Important notes</text:span></text:h>
      <text:list text:style-name="L4">
        <text:list-item>
          <text:p text:style-name="P52">This action affects <text:span text:style-name="Strong_20_Emphasis">only the current record</text:span></text:p>
        </text:list-item>
        <text:list-item>
          <text:p text:style-name="P52">The previous Case Name is <text:span text:style-name="Strong_20_Emphasis">replaced</text:span>, not preserved</text:p>
        </text:list-item>
        <text:list-item>
          <text:p text:style-name="P52">No duplicate case record is created automatically</text:p>
        </text:list-item>
        <text:list-item>
          <text:p text:style-name="P52">Simply changing the Case Name <text:span text:style-name="Strong_20_Emphasis">does not</text:span> create a new case unless this box is checked</text:p>
        </text:list-item>
        <text:list-item>
          <text:p text:style-name="P52">After saving, the option automatically resets</text:p>
        </text:list-item>
      </text:list>
      <text:h text:style-name="P48" text:outline-level="3"><text:span text:style-name="Strong_20_Emphasis">In short</text:span></text:h>
      <text:p text:style-name="P53"><text:span text:style-name="Strong_20_Emphasis">“</text:span><text:span text:style-name="Strong_20_Emphasis"><text:span text:style-name="T85">Edit Case Name</text:span></text:span><text:span text:style-name="Strong_20_Emphasis">” reassigns the current record to a new case. It does not keep a copy of the previous case name.</text:span></text:p>
      <text:p text:style-name="P54"/>
      <text:p text:style-name="P55">Initial Contact Date</text:p>
      <text:p text:style-name="P56"/>
      <text:p text:style-name="P57">The date entered here is the date/time when contact was first made with the client.</text:p>
      <text:p text:style-name="P57"/>
      <text:p text:style-name="P55">Investigation #</text:p>
      <text:p text:style-name="P56"/>
      <text:p text:style-name="P57">This number represents the unique investigation number. It is automatically generated upon new record creation and is <text:span text:style-name="T86">read-only.</text:span> </text:p>
      <text:p text:style-name="P40"/>
      <text:p text:style-name="P55">Case Investigation #</text:p>
      <text:p text:style-name="P57"/>
      <text:p text:style-name="P57">Each case may have several investigations associated with it. This number represents the number of the investigation that is associated with the current case. <text:span text:style-name="T86">It is automatically created when a new investigation is created and is associated with an existing case. It is also read-only.</text:span></text:p>
      <text:p text:style-name="P58"/>
      <text:p text:style-name="P59">Location Name</text:p>
      <text:p text:style-name="P60"/>
      <text:p text:style-name="P61">The name entered here is not required, but can help identify the location. There may be several buildings on the same property and each investigation may be conducted entirely in different buildings. </text:p>
      <text:p text:style-name="P61"/>
      <text:p text:style-name="P55">Compare</text:p>
      <text:p text:style-name="P57"/>
      <text:p text:style-name="P57">This field is for <text:span text:style-name="T87">selecting and viewing</text:span> another investigation that is associated with the current case and comparing <text:span text:style-name="T87">the </text:span>details with the current investigation. When the user selects a case from the drop-down, the other case is opened in a popup window. Users can adjust <text:span text:style-name="T87">the popup </text:span>settings as desired.</text:p>
      <text:p text:style-name="P40"/>
      <text:p text:style-name="P62"/>
      <text:p text:style-name="P62"/>
      <text:p text:style-name="P62"><text:soft-page-break/>Street, City, State/Province, Country, Directions, Contact Phone</text:p>
      <text:p text:style-name="P63"/>
      <text:p text:style-name="P63">These fields are self explanatory.</text:p>
      <text:p text:style-name="P64"/>
      <text:p text:style-name="P65">Contact Name</text:p>
      <text:p text:style-name="P66"/>
      <text:p text:style-name="P66">After a client user is added to the system, a client name is selected from this field to associate the selected client with the investigation. </text:p>
      <text:p text:style-name="P40"/>
      <text:p text:style-name="P65">Resident/Property Owner’s Name, Owner’s Phone</text:p>
      <text:p text:style-name="P66"/>
      <text:p text:style-name="P66">If the current resident of the property is different than the client, enter that person’s name <text:span text:style-name="T88">and phone number</text:span> here.</text:p>
      <text:p text:style-name="P66"/>
      <text:p text:style-name="P42">Owner Contacted, Permission Waiver Signed, Privacy Notice Requested</text:p>
      <text:p text:style-name="P42"/>
      <text:p text:style-name="P67">If these actions have been taken, enable the check-boxes.</text:p>
      <text:p text:style-name="P67"/>
      <text:p text:style-name="P42">Notes</text:p>
      <text:p text:style-name="P67"/>
      <text:p text:style-name="P67">Add any notes that are relevant to the investigation. </text:p>
      <text:p text:style-name="P67"/>
      <text:p text:style-name="P68">Sending Email</text:p>
      <text:p text:style-name="P69"/>
      <text:p text:style-name="P70"><text:span text:style-name="T51">The fastest (and simplest) way to send a welcome email </text:span><text:span text:style-name="T54">to new users </text:span><text:span text:style-name="T51">is by using the ‘</text:span><text:span text:style-name="T89">Send Email</text:span><text:span text:style-name="T51">’ button on the main form. </text:span><text:span text:style-name="T90">SpiritForm</text:span><text:span text:style-name="T73">s</text:span><text:span text:style-name="T90"> does NOT use nuBuilders’ native email system. Instead, a separate email system was added when SpirirtForm was created. It is easy to use and does not require complicated setup. No hassle with templates or codes or special code-writing sessions. Just click a couple </text:span><text:span text:style-name="T91">of </text:span><text:span text:style-name="T90">buttons, and your email is ready to go. </text:span><text:span text:style-name="T92">You can access email from the User Home or from a</text:span><text:span text:style-name="T93">n</text:span><text:span text:style-name="T92"> </text:span><text:span text:style-name="T93">investigation</text:span><text:span text:style-name="T92"> record. </text:span><text:span text:style-name="T94">When creating an email from a</text:span><text:span text:style-name="T93">n</text:span><text:span text:style-name="T94"> </text:span><text:span text:style-name="T93">investigation</text:span><text:span text:style-name="T94"> record, the email address is automatically populated with the clients’ email address and the subject is also automatically populated with the case name </text:span><text:span text:style-name="T95">and investigation number.</text:span><text:span text:style-name="T94"> </text:span></text:p>
      <text:p text:style-name="P70"/>
      <text:p text:style-name="P70"><draw:frame draw:style-name="fr2" draw:name="Image5" text:anchor-type="char" svg:x="0.022in" svg:y="0.028in" svg:width="4.9807in" svg:height="2.8398in" draw:z-index="19"><draw:image xlink:href="Pictures/1000000100000374000001F840067AA2.png" xlink:type="simple" xlink:show="embed" xlink:actuate="onLoad" draw:mime-type="image/png"/></draw:frame></text:p>
      <text:p text:style-name="P70"/>
      <text:p text:style-name="P71"><text:span text:style-name="Strong_20_Emphasis"><text:span text:style-name="T81"/></text:span></text:p>
      <text:p text:style-name="P71"><text:span text:style-name="Strong_20_Emphasis"><text:span text:style-name="T81"/></text:span></text:p>
      <text:p text:style-name="P71"><text:span text:style-name="Strong_20_Emphasis"><text:span text:style-name="T81"/></text:span></text:p>
      <text:p text:style-name="P71"><text:span text:style-name="Strong_20_Emphasis"><text:span text:style-name="T81"/></text:span></text:p>
      <text:p text:style-name="P71"><text:span text:style-name="Strong_20_Emphasis"><text:span text:style-name="T81"/></text:span></text:p>
      <text:p text:style-name="P71"><draw:custom-shape text:anchor-type="paragraph" draw:z-index="20" draw:name="Shape 2" draw:style-name="gr1" draw:text-style-name="P72" svg:width="0.7031in" svg:height="0.1913in" svg:x="1.7264in" svg:y="-0.07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 text:style-name="Strong_20_Emphasis"><text:span text:style-name="T81"/></text:span></text:p>
      <text:p text:style-name="P71"><text:soft-page-break/><text:span text:style-name="Strong_20_Emphasis"><text:span text:style-name="T81">Email Visibility</text:span></text:span></text:p>
      <text:p text:style-name="P73"><text:span text:style-name="T96">When users click on the ‘Open Email List’ link, they </text:span>see only the emails they personally created, including drafts and sent messages. <text:span text:style-name="T96">Globeadmin users</text:span> can view all emails for auditing and support purposes. This prevents accidental exposure of draft emails while still allowing <text:span text:style-name="T96">globeadmin </text:span>administrators full oversight.</text:p>
      <text:p text:style-name="P73"><text:span text:style-name="Strong_20_Emphasis"><text:span text:style-name="T81">Client Email Responses</text:span></text:span></text:p>
      <text:p text:style-name="P73">Replies to emails sent from SpiritForm<text:span text:style-name="T97">s</text:span> are delivered to the system email inbox configured in <text:span text:style-name="Strong_20_Emphasis">Setup → Email</text:span>.</text:p>
      <text:p text:style-name="P73">Client responses are not imported automatically. Relevant replies should be reviewed and then manually added to the associated <text:span text:style-name="T98">i</text:span>nvestigation using <text:span text:style-name="Strong_20_Emphasis"><text:span text:style-name="T99">Emails From The Client </text:span></text:span><text:span text:style-name="Strong_20_Emphasis"><text:span text:style-name="T100">on the Location and Contact tab</text:span></text:span>. This ensures that only appropriate, relevant, and verified communications become part of the <text:span text:style-name="T101">i</text:span>nvestigation record. </text:p>
      <text:p text:style-name="P74">The suggested way to add them is to: </text:p>
      <text:p text:style-name="P74">1.) In the email client, <text:span text:style-name="T102">select an email. U</text:span>se the ‘Forward’ feature <text:span text:style-name="T102">of the email client </text:span>to open a new email.</text:p>
      <text:p text:style-name="P74">2.) Copy the <text:span text:style-name="T102">entire </text:span>email including the message header </text:p>
      <text:p text:style-name="P74">3.) Paste the message into the WYSIWYG editor <text:span text:style-name="T103">using CTRL-SHIFT-V (Windows) or CMD-SHIFT-V (Mac). This pastes the message in plain text format.</text:span></text:p>
      <text:p text:style-name="P74">4.) Enter a horizontal line at the <text:span text:style-name="T104">top and </text:span>bottom of the email to create a visual separator (enter three dashes --- and then the space bar). </text:p>
      <text:p text:style-name="P74">5.) Save the record.</text:p>
      <text:p text:style-name="P75">Now you have a chronological history of all emails from the client in one place. <text:span text:style-name="T105">When clicking the ‘Send Email’ button, the Email Composer window will be situated to the left of the WYSIWYG editor. <text:s/></text:span></text:p>
      <text:p text:style-name="P76"/>
      <text:p text:style-name="P41">History Tab</text:p>
      <text:p text:style-name="P77"/>
      <text:p text:style-name="P77">Location History</text:p>
      <text:p text:style-name="P43"/>
      <text:p text:style-name="P67">Enter a brief history of the property. If there are supporting research documents, use the <text:span text:style-name="T24">Upload History/Research Documents</text:span> button to upload them to the server. Only users with <text:span text:style-name="T24">Tiny File Manager</text:span> permissions have this feature available to them. <text:span text:style-name="T106">Once the documents have been uploaded, users can create a .zip file containing all of the history research documents using Tiny File Manager. The .zip file can then be downloaded using the </text:span><text:span text:style-name="T107">Download Documents</text:span><text:span text:style-name="T106"> button.</text:span></text:p>
      <text:p text:style-name="P78"/>
      <text:p text:style-name="P79"/>
      <text:p text:style-name="P79"/>
      <text:p text:style-name="P79"><text:soft-page-break/>User Access to Tiny File Manager (Advanced / High-Risk)</text:p>
      <text:p text:style-name="P80"/>
      <text:p text:style-name="P81">If you don’t fully understand nuBuilder’s file structure, do not enable Tiny File Manager for any user. </text:p>
      <text:p text:style-name="P80"/>
      <text:p text:style-name="P80">By default, nuBuilder users (other than globeadmin) do NOT have access to Tiny File Manager (TFM).</text:p>
      <text:p text:style-name="P80">This restriction exists for good reason.</text:p>
      <text:p text:style-name="P80"/>
      <text:p text:style-name="P80">It is possible to grant access to individual users, but doing so carries security risks.</text:p>
      <text:p text:style-name="P80"/>
      <text:p text:style-name="P80">⚠ WARNING — RISK</text:p>
      <text:p text:style-name="P80">Granting Tiny File Manager access allows the user to browse the entire nuBuilder file system, including sensitive files such as:</text:p>
      <text:p text:style-name="P80"/>
      <text:p text:style-name="P80">-nuconfig.php</text:p>
      <text:p text:style-name="P80"/>
      <text:p text:style-name="P80">-PHP core files</text:p>
      <text:p text:style-name="P80"/>
      <text:p text:style-name="P80">-third-party libraries</text:p>
      <text:p text:style-name="P80"/>
      <text:p text:style-name="P80">-uploaded files belonging to all cases and users</text:p>
      <text:p text:style-name="P80"/>
      <text:p text:style-name="P80">This is equivalent to granting partial server-level access.</text:p>
      <text:p text:style-name="P80">Apply this setting only to trusted technical users and never to clients.</text:p>
      <text:p text:style-name="P80"/>
      <text:p text:style-name="P80">⚠️ IMPORTANT: Access-Level Side Effects</text:p>
      <text:p text:style-name="P80"/>
      <text:p text:style-name="P80">SpiritForm<text:span text:style-name="T73">s</text:span> contains custom access-level logic and JavaScript restrictions that assume:</text:p>
      <text:p text:style-name="P80"/>
      <text:p text:style-name="P80">-Only globeadmin has unrestricted file-system access</text:p>
      <text:p text:style-name="P80"/>
      <text:p text:style-name="P80">-Other users are sandboxed via form logic, buttons, and permissions</text:p>
      <text:p text:style-name="P80"/>
      <text:p text:style-name="P80">-Granting Tiny File Manager access bypasses many of those assumptions.</text:p>
      <text:p text:style-name="P80"/>
      <text:p text:style-name="P80">This may result in:</text:p>
      <text:p text:style-name="P80"/>
      <text:p text:style-name="P80">-Users seeing files they were never meant to access</text:p>
      <text:p text:style-name="P80"/>
      <text:p text:style-name="P80">-Inconsistent behavior between forms</text:p>
      <text:p text:style-name="P80"/>
      <text:p text:style-name="P80">-Access paths that ignore SpiritForms’ role-based safeguards</text:p>
      <text:p text:style-name="P80"/>
      <text:p text:style-name="P80">In short:</text:p>
      <text:p text:style-name="P80">TFM access operates outside SpiritForms’ normal security model.</text:p>
      <text:p text:style-name="P80"/>
      <text:p text:style-name="P81"/>
      <text:p text:style-name="P81"/>
      <text:p text:style-name="P81"><text:soft-page-break/></text:p>
      <text:p text:style-name="P81"/>
      <text:p text:style-name="P81">How to Grant Access (If You Absolutely Must)</text:p>
      <text:p text:style-name="P81"/>
      <text:p text:style-name="P81">1️. Modify nuconfig.php</text:p>
      <text:p text:style-name="P80"/>
      <text:p text:style-name="P82">Add the following line, replacing the ID with the User Record ID of the person you are granting access to. </text:p>
      <text:p text:style-name="P83"/>
      <text:p text:style-name="P83">For example:</text:p>
      <text:p text:style-name="P82">//Tiny File Manager users - Edit CAREFULLY. </text:p>
      <text:p text:style-name="P82">$nuConfigFileMangerUsers = "65046e167e07b56,58f0e5fb18f0e21"; <text:s/>// User IDs with Tiny File Manager permission (comma-separated)</text:p>
      <text:p text:style-name="P80"/>
      <text:p text:style-name="P80">These are User Record IDs, not usernames</text:p>
      <text:p text:style-name="P80"/>
      <text:p text:style-name="P81">2️. <text:span text:style-name="T108">To R</text:span>etrieve the User Record ID</text:p>
      <text:p text:style-name="P80"/>
      <text:p text:style-name="P83">Log in as globeadmin</text:p>
      <text:p text:style-name="P83"/>
      <text:p text:style-name="P80">In the <text:span text:style-name="T109">Users</text:span> form:</text:p>
      <text:p text:style-name="P80"/>
      <text:p text:style-name="P80">Open the relevant user</text:p>
      <text:p text:style-name="P80"/>
      <text:p text:style-name="P80">Press CTRL + SHIFT + M</text:p>
      <text:p text:style-name="P80"/>
      <text:p text:style-name="P80">Copy the Record ID (primary key)</text:p>
      <text:p text:style-name="P80"/>
      <text:p text:style-name="P81">3️. Restart Your Browser</text:p>
      <text:p text:style-name="P80"/>
      <text:p text:style-name="P80">Changes to nuconfig.php are cached.</text:p>
      <text:p text:style-name="P80">You must fully restart your browser before the new permissions take effect.</text:p>
      <text:p text:style-name="P80"/>
      <text:p text:style-name="P80">🧠 Recommended Best Practices</text:p>
      <text:p text:style-name="P80"/>
      <text:p text:style-name="P80">✅ Prefer controlled upload buttons inside SpiritForm<text:span text:style-name="T73">s</text:span> whenever possible</text:p>
      <text:p text:style-name="P80"/>
      <text:p text:style-name="P80">✅ Restrict Tiny File Manager access to:</text:p>
      <text:p text:style-name="P80"/>
      <text:p text:style-name="P80">-globeadmin</text:p>
      <text:p text:style-name="P80"/>
      <text:p text:style-name="P80">-trusted technical administrators only</text:p>
      <text:p text:style-name="P80"/>
      <text:p text:style-name="P80">❌ Never grant TFM access to clients or non-technical users</text:p>
      <text:p text:style-name="P80"/>
      <text:p text:style-name="P80">❌ Do not assume SpiritForm<text:span text:style-name="T73">s</text:span> access levels will protect files once TFM is enabled</text:p>
      <text:p text:style-name="P80"/>
      <text:p text:style-name="P80">📌 Summary (Plain English)</text:p>
      <text:p text:style-name="P80"/>
      <text:p text:style-name="P80"><text:soft-page-break/>Tiny File Manager access is powerful, global, and blunt.</text:p>
      <text:p text:style-name="P80">SpiritForm<text:span text:style-name="T73">s</text:span> access control is granular and intentional.</text:p>
      <text:p text:style-name="P80">Mixing the two should be done rarely, knowingly, and cautiously.</text:p>
      <text:p text:style-name="P84"/>
      <text:p text:style-name="P85"/>
      <text:p text:style-name="P85">Historical Researcher/Compiler</text:p>
      <text:p text:style-name="P86">Select the Team Member(s) who conducted the research.</text:p>
      <text:p text:style-name="P85">Building &amp; Property Description, Rooms, Other Structures</text:p>
      <text:p text:style-name="P87">Enter the descriptions for the property and buildings (homes, garages, sheds, sheds, etc.).</text:p>
      <text:p text:style-name="P88">Areas of <text:span text:style-name="T110">R</text:span>eported <text:span text:style-name="T110">P</text:span>aranormal <text:span text:style-name="T110">A</text:span>ctivity </text:p>
      <text:p text:style-name="P86">List all areas of reported paranormal activity here, including brief descriptions of the activity.</text:p>
      <text:p text:style-name="P89">Recent Remodel/Construction/Renovations?</text:p>
      <text:p text:style-name="P90">If there have been any recent modifications/updates or renovations to any of the buildings, tick the check-box and briefly list them in the <text:span text:style-name="T24">Remodel/Construction/Renovation Notes</text:span> field.</text:p>
      <text:p text:style-name="P89">Has a priest blessed the home?</text:p>
      <text:p text:style-name="P90">If true, tick the check-box. <text:span text:style-name="T111">If the priest had mentioned any odd activity during the blessing, make note of it in the </text:span><text:span text:style-name="T112">Priest Blessing Notes</text:span><text:span text:style-name="T111"> field.</text:span></text:p>
      <text:p text:style-name="P91"/>
      <text:p text:style-name="P91">Witness Statements Tab</text:p>
      <text:p text:style-name="P92">Enter witness names and their experiences on this tab. <text:s/></text:p>
      <text:p text:style-name="P91">Investigation Tab</text:p>
      <text:p text:style-name="P93">Investigation Start Time, <text:span text:style-name="T113">Investigation End Time</text:span></text:p>
      <text:p text:style-name="P92">If an investigation has been done, it is important to enter the start and end times of the investigation in the appropriate fields (<text:span text:style-name="T24">Investigation Start Time</text:span> and <text:span text:style-name="T24">Investigation End Time</text:span>). If Investigation Start Time is not entered, then the Report <text:span text:style-name="T114">(on the </text:span><text:span text:style-name="T115">Report Editor</text:span><text:span text:style-name="T114"> tab) </text:span>cannot be marked as complete.</text:p>
      <text:p text:style-name="P92"><draw:frame draw:style-name="fr2" draw:name="Image7" text:anchor-type="char" svg:x="1.0555in" svg:y="-0.0472in" svg:width="4.9189in" svg:height="1.0425in" draw:z-index="2"><draw:image xlink:href="Pictures/10000001000001F600000071891220AF.png" xlink:type="simple" xlink:show="embed" xlink:actuate="onLoad" draw:mime-type="image/png"/></draw:frame></text:p>
      <text:p text:style-name="P92"/>
      <text:p text:style-name="P92"/>
      <text:p text:style-name="P92"/>
      <text:p text:style-name="P94"><text:soft-page-break/>Investigators Present</text:p>
      <text:p text:style-name="P95">Select the investigators that were present during the investigation.</text:p>
      <text:p text:style-name="P94"/>
      <text:p text:style-name="P94">Others Joining the Investigation</text:p>
      <text:p text:style-name="P95">If there were any others (the client, friends or relatives of the client, etc.) present during the investigation, enter their names here.</text:p>
      <text:p text:style-name="P94">Weather Conditions</text:p>
      <text:p text:style-name="P95">Enter the weather conditions that existed during the investigation (rain, wind, temperature, precipitation, etc.). </text:p>
      <text:p text:style-name="P94">Moon Phase at Time Of Investigation</text:p>
      <text:p text:style-name="P96">Select the moon phase that existed at the time of the investigation. A “Lunar Calendar” link to an external web site is provided to assist with this information. Because web sites come and go frequently on the internet, this link may or may not <text:span text:style-name="T116">work</text:span>. <text:span text:style-name="T116">Enter the hyperlink to the image of the moon phase in the </text:span><text:span text:style-name="T117">Moon Phase Image URL</text:span><text:span text:style-name="T116"> field. It may be necessary to download the moon phase image, upload it to the server, and enter that link in the <text:s/></text:span><text:span text:style-name="T117">Moon Phase Image URL</text:span><text:span text:style-name="T116"> field. A field and upload button are <text:s/>provided for that purpose.</text:span></text:p>
      <text:p text:style-name="P97">Devices Used</text:p>
      <text:p text:style-name="P98">Select the devices that were used during the investigation. If a device is not listed, it can be added (with globeadmin user only) by editing using the <text:span text:style-name="T24">Edit Devices List</text:span> button on the <text:span text:style-name="T24">Maintenance</text:span> tab.</text:p>
      <text:p text:style-name="P99">Phone Apps Used</text:p>
      <text:p text:style-name="P100">Select the phone apps used during the investigation. <text:span text:style-name="T118">If a</text:span>n<text:span text:style-name="T118"> </text:span>App<text:span text:style-name="T118"> is not listed, it can be added (with globeadmin user only) by editing using the </text:span><text:span text:style-name="T119">Edit </text:span><text:span text:style-name="T24">Phone Apps</text:span><text:span text:style-name="T119"> List</text:span><text:span text:style-name="T118"> button on the </text:span><text:span text:style-name="T119">Maintenance</text:span><text:span text:style-name="T118"> tab.</text:span></text:p>
      <text:p text:style-name="P99">Computer Apps Used</text:p>
      <text:p text:style-name="P100">Select the computer apps used during the investigation. <text:span text:style-name="T118">If a</text:span>n<text:span text:style-name="T118"> </text:span>App<text:span text:style-name="T118"> is not listed, it can be added (with globeadmin user only) by editing using the </text:span><text:span text:style-name="T119">Edit </text:span><text:span text:style-name="T24">Computer Apps</text:span><text:span text:style-name="T119"> List</text:span><text:span text:style-name="T118"> button on the </text:span><text:span text:style-name="T119">Maintenance</text:span><text:span text:style-name="T118"> tab.</text:span></text:p>
      <text:p text:style-name="P101">Anomalous Readings, Anomalous Readings Date/Time</text:p>
      <text:p text:style-name="P102">Enter anomalous readings measured from devices. Add the Date/Time provided in the Date/Time field provided.</text:p>
      <text:p text:style-name="P101">Additional Notes &amp; Observations</text:p>
      <text:p text:style-name="P102">Enter any additional notes and observations from the investigation.</text:p>
      <text:p text:style-name="P103"><text:soft-page-break/>Personal Experiences Tab</text:p>
      <text:p text:style-name="P104">Enter personal experiences here. Be sure to also select the investigator(s) who had the experience and the date/time the experience took place.</text:p>
      <text:p text:style-name="P103"/>
      <text:p text:style-name="P103">Audio Tab</text:p>
      <text:p text:style-name="P105">Audio Description, Audio Time</text:p>
      <text:p text:style-name="P106">Enter a detailed description and date/time of the audio recording. Use the <text:span text:style-name="T24">Upload Audio Files</text:span> button to upload the file(s). Only globeadmin or users with <text:span text:style-name="T120">Tiny File Manager</text:span> permissions may upload files. Once files are uploaded, copy the urls of the files from Tiny File Manager into the spaces provided in the form, <text:span text:style-name="T121">then c</text:span>lick each <text:span text:style-name="T24">Listen </text:span>button to listen to the audio files. <text:span text:style-name="T121">In Tiny File Manager, create a .zip file of all the uploaded audio files. Then click the </text:span><text:span text:style-name="T122">Download Audio Files</text:span><text:span text:style-name="T121"> button to download the .zip file. </text:span><text:span text:style-name="T123">All users have access to the </text:span><text:span text:style-name="T122">Download Audio Files</text:span><text:span text:style-name="T121"> button.</text:span></text:p>
      <text:p text:style-name="P107"><text:span text:style-name="T124">Video</text:span> Tab</text:p>
      <text:p text:style-name="P108"><text:span text:style-name="T124">Video</text:span> Description, <text:span text:style-name="T124">Video</text:span> Time</text:p>
      <text:p text:style-name="P109">Enter a detailed description and date/time of the <text:span text:style-name="T124">video</text:span> recording. Use the <text:span text:style-name="T24">Upload </text:span><text:span text:style-name="T125">Video</text:span><text:span text:style-name="T24"> Files</text:span> button to upload the file(s). Only globeadmin or users with <text:span text:style-name="T120">Tiny File Manager</text:span> permissions may upload files. Once files are uploaded, copy the urls of the files from Tiny File Manager into the spaces provided in the form, <text:span text:style-name="T121">then c</text:span>lick each <text:span text:style-name="T125">Watch</text:span><text:span text:style-name="T24"> </text:span>button to <text:span text:style-name="T124">watch the video</text:span> files. <text:span text:style-name="T121">In Tiny File Manager, create a .zip file of all the uploaded </text:span><text:span text:style-name="T124">video</text:span><text:span text:style-name="T121"> files. Then click the </text:span><text:span text:style-name="T122">Download </text:span><text:span text:style-name="T125">Video</text:span><text:span text:style-name="T122"> Files</text:span><text:span text:style-name="T121"> button to download the .zip file. </text:span><text:span text:style-name="T123">All users have access to the </text:span><text:span text:style-name="T122">Download </text:span><text:span text:style-name="T125">Video </text:span><text:span text:style-name="T122">Files</text:span><text:span text:style-name="T121"> button.</text:span></text:p>
      <text:p text:style-name="P107"><text:span text:style-name="T124">Photo</text:span> Tab</text:p>
      <text:p text:style-name="P108"><text:span text:style-name="T124">Photo</text:span> Description, <text:span text:style-name="T124">Photo</text:span> Time</text:p>
      <text:p text:style-name="P109">Enter a detailed description and date/time of the <text:span text:style-name="T124">photo. </text:span>Use the <text:span text:style-name="T24">Upload </text:span><text:span text:style-name="T125">Photo</text:span><text:span text:style-name="T24"> Files</text:span> button to upload the file(s). Only globeadmin or users with <text:span text:style-name="T120">Tiny File Manager</text:span> permissions may upload files. Once files are uploaded, copy the urls of the files from Tiny File Manager into the spaces provided in the form, <text:span text:style-name="T121">then c</text:span>lick each <text:span text:style-name="T125">View</text:span><text:span text:style-name="T24"> </text:span>button to <text:span text:style-name="T124">view the photos</text:span>. <text:span text:style-name="T121">In Tiny File Manager, create a .zip file of all the uploaded </text:span><text:span text:style-name="T124">photo</text:span><text:span text:style-name="T121"> files. Then click the </text:span><text:span text:style-name="T122">Download </text:span><text:span text:style-name="T125">Photo</text:span><text:span text:style-name="T122"> Files</text:span><text:span text:style-name="T121"> button to download the .zip file. </text:span><text:span text:style-name="T123">All users have access to the </text:span><text:span text:style-name="T122">Download </text:span><text:span text:style-name="T125">Photo </text:span><text:span text:style-name="T122">Files</text:span><text:span text:style-name="T121"> button.</text:span></text:p>
      <text:p text:style-name="P110">Summary Tab</text:p>
      <text:p text:style-name="P111">Enter a brief summary of the investigation. </text:p>
      <text:p text:style-name="P112"/>
      <text:p text:style-name="P112"><text:soft-page-break/>Report Editor Tab <text:span text:style-name="T126">(globeadmin only)</text:span></text:p>
      <text:p text:style-name="P113">Report Templates</text:p>
      <text:p text:style-name="P114">Before creating a Report, select a template from the <text:span text:style-name="T24">Select a Template</text:span> drop-down. The SpiritForms application comes with pre-defined templates, but they are used as placeholders only. Only the globeadmin user can create/edit templates. They are accessed from the <text:span text:style-name="T24">Maintenance</text:span> tab. </text:p>
      <text:p text:style-name="P115">After selecting a report template, click the <text:span text:style-name="T24">Copy HTML Template</text:span> button. This places the HTML template into the clipboard. Now click <text:span text:style-name="T24">Tools</text:span> &gt; <text:span text:style-name="T24">&lt;&gt; Source Code </text:span>in the WYSIWYG editor. This opens the Source Code window. Paste the source code into the window using CTRL-V. Now you can edit the source code to complete the report. Get multimedia urls from Tiny File Manager by clicking the <text:span text:style-name="T24">Get Media URL’s</text:span> button <text:span text:style-name="T127">or by copying them from the Audio, Video and Photo tabs.</text:span></text:p>
      <text:p text:style-name="P116"><text:span text:style-name="T128">To view the report as it will appear to the client, click on the </text:span><text:span text:style-name="T129">View Report</text:span><text:span text:style-name="T128"> button. It will open a new tab with the report. </text:span><text:span text:style-name="T130">The report header will provide </text:span><text:span text:style-name="Strong_20_Emphasis"><text:span text:style-name="T131">Investigation Number, Case Name, </text:span></text:span><text:span text:style-name="Strong_20_Emphasis"><text:span text:style-name="T132">C</text:span></text:span><text:span text:style-name="Strong_20_Emphasis"><text:span text:style-name="T131">ontact Name, </text:span></text:span><text:span text:style-name="Strong_20_Emphasis"><text:span text:style-name="T132">and </text:span></text:span><text:span text:style-name="Strong_20_Emphasis"><text:span text:style-name="T131">Investigation Date.</text:span></text:span></text:p>
      <text:p text:style-name="P117"><text:span text:style-name="Strong_20_Emphasis"><text:span text:style-name="T132">When the report is complete, click the </text:span></text:span><text:span text:style-name="Strong_20_Emphasis"><text:span text:style-name="T133">Report Is Complete </text:span></text:span><text:span text:style-name="Strong_20_Emphasis"><text:span text:style-name="T134">check box. This allows the client to view and download the report. Be aware that </text:span></text:span><text:span text:style-name="Strong_20_Emphasis"><text:span text:style-name="T133">Investigation Start Time</text:span></text:span><text:span text:style-name="Strong_20_Emphasis"><text:span text:style-name="T134"> (Investigation tab) must be entered before the Report can be marked as complete. </text:span></text:span><text:span text:style-name="Strong_20_Emphasis"><text:span text:style-name="T135">A reminder will be triggered if </text:span></text:span><text:span text:style-name="Strong_20_Emphasis"><text:span text:style-name="T133">Investigation Start Time</text:span></text:span><text:span text:style-name="Strong_20_Emphasis"><text:span text:style-name="T134"> </text:span></text:span><text:span text:style-name="Strong_20_Emphasis"><text:span text:style-name="T135">has not been populated.</text:span></text:span></text:p>
      <text:p text:style-name="P118"><text:span text:style-name="Strong_20_Emphasis"><text:span text:style-name="T136">A quick, </text:span></text:span><text:span text:style-name="Strong_20_Emphasis"><text:span text:style-name="T137">but very</text:span></text:span><text:span text:style-name="Strong_20_Emphasis"><text:span text:style-name="T136"> important </text:span></text:span><text:span text:style-name="Strong_20_Emphasis"><text:span text:style-name="T137">distinction </text:span></text:span><text:span text:style-name="Strong_20_Emphasis"><text:span text:style-name="T136">here </text:span></text:span><text:span text:style-name="Strong_20_Emphasis"><text:span text:style-name="T137">between SpiritForm</text:span></text:span><text:span text:style-name="Strong_20_Emphasis"><text:span text:style-name="T138">s</text:span></text:span><text:span text:style-name="Strong_20_Emphasis"><text:span text:style-name="T137"> </text:span></text:span><text:span text:style-name="Strong_20_Emphasis"><text:span text:style-name="T136">‘Reports’ </text:span></text:span><text:span text:style-name="Strong_20_Emphasis"><text:span text:style-name="T137">and nuBuilder ‘Reports’</text:span></text:span><text:span text:style-name="Strong_20_Emphasis"><text:span text:style-name="T136">.</text:span></text:span><text:span text:style-name="Strong_20_Emphasis"><text:span text:style-name="T139"> SpiritForm</text:span></text:span><text:span text:style-name="Strong_20_Emphasis"><text:span text:style-name="T140">s</text:span></text:span><text:span text:style-name="Strong_20_Emphasis"><text:span text:style-name="T139"> Reports are NOT nu</text:span></text:span><text:span text:style-name="Strong_20_Emphasis"><text:span text:style-name="T141">B</text:span></text:span><text:span text:style-name="Strong_20_Emphasis"><text:span text:style-name="T139">uilder reports. </text:span></text:span><text:span text:style-name="Strong_20_Emphasis"><text:span text:style-name="T142">n</text:span></text:span><text:span text:style-name="Strong_20_Emphasis"><text:span text:style-name="T139">uBuilder has its own built-in Reports functionality which is </text:span></text:span><text:span text:style-name="Strong_20_Emphasis"><text:span text:style-name="T143">not user friendly AT ALL.</text:span></text:span><text:span text:style-name="Strong_20_Emphasis"><text:span text:style-name="T139"> Hence the reason why I adapted the nuBuilder ‘Notes’ functionality for creating SpiritForm</text:span></text:span><text:span text:style-name="Strong_20_Emphasis"><text:span text:style-name="T140">s</text:span></text:span><text:span text:style-name="Strong_20_Emphasis"><text:span text:style-name="T139"> Report </text:span></text:span><text:span text:style-name="Strong_20_Emphasis"><text:span text:style-name="T144">templates</text:span></text:span><text:span text:style-name="Strong_20_Emphasis"><text:span text:style-name="T139">. </text:span></text:span></text:p>
      <text:p text:style-name="P118"><text:span text:style-name="Strong_20_Emphasis"><text:span text:style-name="T145"/></text:span></text:p>
      <text:p text:style-name="P119"><text:span text:style-name="Strong_20_Emphasis"><text:span text:style-name="T146">Maintenance Tab (globeadmin only)</text:span></text:span></text:p>
      <text:p text:style-name="P119"><text:span text:style-name="Strong_20_Emphasis"><text:span text:style-name="T147">Add/Edit All Users</text:span></text:span></text:p>
      <text:p text:style-name="P119"><text:span text:style-name="Strong_20_Emphasis"><text:span text:style-name="T148">This is where all users are added or maintained. It is accessible by globeadmin users only.</text:span></text:span></text:p>
      <text:p text:style-name="P119"><text:span text:style-name="Strong_20_Emphasis"><text:span text:style-name="T149">Edit Devices List</text:span></text:span></text:p>
      <text:p text:style-name="P119"><text:span text:style-name="Strong_20_Emphasis"><text:span text:style-name="T148">Devices used in investigations are added, modified, or removed here. <text:s/>It is accessible by globeadmin users only.</text:span></text:span></text:p>
      <text:p text:style-name="P119"><text:span text:style-name="Strong_20_Emphasis"><text:span text:style-name="T149">Edit Phone Apps List</text:span></text:span></text:p>
      <text:p text:style-name="P119"><text:span text:style-name="Strong_20_Emphasis"><text:span text:style-name="T148">Phone apps used in investigations are added, modified, or removed here. <text:s/>It is accessible by globeadmin users only.</text:span></text:span></text:p>
      <text:p text:style-name="P119"><text:span text:style-name="Strong_20_Emphasis"><text:span text:style-name="T149">Edit Computer Apps List</text:span></text:span></text:p>
      <text:p text:style-name="P119"><text:span text:style-name="Strong_20_Emphasis"><text:span text:style-name="T148">Computer apps used in investigations are added, modified, or removed here. <text:s/>It is accessible by globeadmin users only.</text:span></text:span></text:p>
      <text:p text:style-name="P119"><text:soft-page-break/><text:span text:style-name="Strong_20_Emphasis"><text:span text:style-name="T149">Manage Report Templates and Notes</text:span></text:span></text:p>
      <text:p text:style-name="P119"><text:span text:style-name="Strong_20_Emphasis"><text:span text:style-name="T148">Clicking this button takes the globeadmin user to a Notes page. ‘Notes’ in nuBuilder are intended for notes only, but they have been repurposed in the SpiritForms application for use as Report Templates. You will notice that each of the pre-existing SpiritForm</text:span></text:span><text:span text:style-name="Strong_20_Emphasis"><text:span text:style-name="T150">s</text:span></text:span><text:span text:style-name="Strong_20_Emphasis"><text:span text:style-name="T148"> templates have been placed in the ‘Reports’ category and regular Notes are placed in the Notes category. This separation allows the Reports creator to select the template in </text:span></text:span><text:span text:style-name="Strong_20_Emphasis"><text:span text:style-name="T151">the </text:span></text:span><text:span text:style-name="Strong_20_Emphasis"><text:span text:style-name="T152">Select a Template</text:span></text:span><text:span text:style-name="Strong_20_Emphasis"><text:span text:style-name="T148"> drop-down in the Report Editor tab. </text:span></text:span></text:p>
      <text:p text:style-name="P119"><text:span text:style-name="Strong_20_Emphasis"><text:span text:style-name="T148"/></text:span></text:p>
      <text:p text:style-name="P120"><text:span text:style-name="Strong_20_Emphasis"><text:span text:style-name="T153">User Workflows</text:span></text:span></text:p>
      <text:p text:style-name="P120"><text:span text:style-name="Strong_20_Emphasis"><text:span text:style-name="T154">When logging in, each user type will see different things. This is intended. </text:span></text:span></text:p>
      <text:p text:style-name="P120"><text:span text:style-name="Strong_20_Emphasis"><text:span text:style-name="T154"/></text:span></text:p>
      <text:p text:style-name="P121"><text:span text:style-name="Strong_20_Emphasis"><text:span text:style-name="T155">Login</text:span></text:span></text:p>
      <text:p text:style-name="P120"><text:span text:style-name="Strong_20_Emphasis"><text:span text:style-name="T156">Because </text:span></text:span><text:span text:style-name="Strong_20_Emphasis"><text:span text:style-name="T157">globeadmin users </text:span></text:span><text:span text:style-name="Strong_20_Emphasis"><text:span text:style-name="T156">have access to everything, they </text:span></text:span><text:span text:style-name="Strong_20_Emphasis"><text:span text:style-name="T157">will initially see this: </text:span></text:span></text:p>
      <text:p text:style-name="P120"><draw:frame draw:style-name="fr2" draw:name="Image8" text:anchor-type="char" svg:x="0.0173in" svg:y="0.0972in" svg:width="5.8902in" svg:height="2.9398in" draw:z-index="3"><draw:image xlink:href="Pictures/100000010000041C0000020DB2DE1113.png" xlink:type="simple" xlink:show="embed" xlink:actuate="onLoad" draw:mime-type="image/png"/></draw:frame><text:span text:style-name="Strong_20_Emphasis"><text:span text:style-name="T157"/></text:span></text:p>
      <text:p text:style-name="P120"><text:span text:style-name="Strong_20_Emphasis"><text:span text:style-name="T157"/></text:span></text:p>
      <text:p text:style-name="P120"><text:span text:style-name="Strong_20_Emphasis"><text:span text:style-name="T157"/></text:span></text:p>
      <text:p text:style-name="P120"><text:span text:style-name="Strong_20_Emphasis"><text:span text:style-name="T157"/></text:span></text:p>
      <text:p text:style-name="P120"><text:span text:style-name="Strong_20_Emphasis"><text:span text:style-name="T157"/></text:span></text:p>
      <text:p text:style-name="P120"><text:span text:style-name="Strong_20_Emphasis"><text:span text:style-name="T157"/></text:span></text:p>
      <text:p text:style-name="P120"><text:span text:style-name="Strong_20_Emphasis"><text:span text:style-name="T157"/></text:span></text:p>
      <text:p text:style-name="P120"><text:span text:style-name="Strong_20_Emphasis"><text:span text:style-name="T157"/></text:span></text:p>
      <text:p text:style-name="P120"><text:span text:style-name="Strong_20_Emphasis"><text:span text:style-name="T157"/></text:span></text:p>
      <text:p text:style-name="P120"><text:span text:style-name="Strong_20_Emphasis"><text:span text:style-name="T157"/></text:span></text:p>
      <text:p text:style-name="P121"><text:span text:style-name="Strong_20_Emphasis"><text:span text:style-name="T155"/></text:span></text:p>
      <text:p text:style-name="P121"><text:span text:style-name="Strong_20_Emphasis"><text:span text:style-name="T155"/></text:span></text:p>
      <text:p text:style-name="P121"><text:span text:style-name="Strong_20_Emphasis"><text:span text:style-name="T155"/></text:span></text:p>
      <text:p text:style-name="P121"><text:span text:style-name="Strong_20_Emphasis"><text:span text:style-name="T155"/></text:span></text:p>
      <text:p text:style-name="P121"><text:span text:style-name="Strong_20_Emphasis"><text:span text:style-name="T155"/></text:span></text:p>
      <text:p text:style-name="P121"><text:span text:style-name="Strong_20_Emphasis"><text:span text:style-name="T155"/></text:span></text:p>
      <text:p text:style-name="P121"><text:soft-page-break/><text:span text:style-name="Strong_20_Emphasis"><text:span text:style-name="T155">User Home</text:span></text:span></text:p>
      <text:p text:style-name="P122"><text:span text:style-name="Strong_20_Emphasis"><text:span text:style-name="T158">When globeadmin clicks on the </text:span></text:span><text:span text:style-name="Strong_20_Emphasis"><text:span text:style-name="T159">green </text:span></text:span><text:span text:style-name="Strong_20_Emphasis"><text:span text:style-name="T160">User Home</text:span></text:span><text:span text:style-name="Strong_20_Emphasis"><text:span text:style-name="T158"> button, they see this:</text:span></text:span></text:p>
      <text:p text:style-name="P122"><draw:frame draw:style-name="fr2" draw:name="Image6" text:anchor-type="char" svg:x="1.1602in" svg:y="0.1055in" svg:width="3.8339in" svg:height="3.2453in" draw:z-index="6"><draw:image xlink:href="Pictures/100000010000020800000231AE868926.png" xlink:type="simple" xlink:show="embed" xlink:actuate="onLoad" draw:mime-type="image/png"/></draw:frame><text:span text:style-name="Strong_20_Emphasis"><text:span text:style-name="T158"/></text:span></text:p>
      <text:p text:style-name="P122"/>
      <text:p text:style-name="P120"><text:span text:style-name="Strong_20_Emphasis"><text:span text:style-name="T157"/></text:span></text:p>
      <text:p text:style-name="P123"/>
      <text:p text:style-name="P123"/>
      <text:p text:style-name="P123"/>
      <text:p text:style-name="P123"/>
      <text:p text:style-name="P123"/>
      <text:p text:style-name="P123"/>
      <text:p text:style-name="P123"/>
      <text:p text:style-name="P124"/>
      <text:p text:style-name="P124"/>
      <text:p text:style-name="P124"/>
      <text:p text:style-name="P124"/>
      <text:p text:style-name="P124">Email Composer (globeadmin)</text:p>
      <text:p text:style-name="P125"/>
      <text:p text:style-name="P126">This button is only visible to globeadmin users. When clicked, the user is taken to the Email Composer where globeadmin sees not only their own emails, but also all emails created by everyone else. This is by design for administrative purposes.</text:p>
      <text:p text:style-name="P126"/>
      <text:p text:style-name="P127">Email Manager (globeadmin)</text:p>
      <text:p text:style-name="P126"/>
      <text:p text:style-name="P126">This button is also only visible to globeadmin users. When clicked, the user is taken to the Email Manager where globeadmin sees all emails by all users and also sees their status (sent, draft). This is by design for administrative purposes. In this view, the globeadmin has permissions to delete old sent (or draft) emails. </text:p>
      <text:p text:style-name="P126"/>
      <text:p text:style-name="P128">Admin and Client User Home</text:p>
      <text:p text:style-name="P129"/>
      <text:p text:style-name="P130">Admin and client users have different <text:span text:style-name="Strong_20_Emphasis"><text:span text:style-name="T161">User Home</text:span></text:span> pages, which limits their access. Admin users have access to the first three buttons, while client <text:span text:style-name="T162">users</text:span> have access to just the first two. </text:p>
      <text:p text:style-name="P130"/>
      <text:p text:style-name="P131"/>
      <text:p text:style-name="P131"/>
      <text:p text:style-name="P131"/>
      <text:p text:style-name="P131"/>
      <text:p text:style-name="P131"/>
      <text:p text:style-name="P131"/>
      <text:p text:style-name="P131"/>
      <text:p text:style-name="P131"/>
      <text:p text:style-name="P131"><text:soft-page-break/>Admin <text:span text:style-name="T163">User Home</text:span>:</text:p>
      <text:p text:style-name="P130"/>
      <text:p text:style-name="P123"/>
      <text:p text:style-name="P123"/>
      <text:p text:style-name="P123"/>
      <text:p text:style-name="P123"><draw:frame draw:style-name="fr2" draw:name="Image10" text:anchor-type="char" svg:x="0.5764in" svg:y="-0.6957in" svg:width="2.6665in" svg:height="2.448in" draw:z-index="8"><draw:image xlink:href="Pictures/10000001000001EF000001DB426CA74C.png" xlink:type="simple" xlink:show="embed" xlink:actuate="onLoad" draw:mime-type="image/png"/></draw:frame></text:p>
      <text:p text:style-name="P123"/>
      <text:p text:style-name="P123"/>
      <text:p text:style-name="P123"/>
      <text:p text:style-name="P123"/>
      <text:p text:style-name="P123"/>
      <text:p text:style-name="P123"/>
      <text:p text:style-name="P130"/>
      <text:p text:style-name="P132"/>
      <text:p text:style-name="P123">SpiritForm<text:span text:style-name="T164">s Investigations</text:span></text:p>
      <text:p text:style-name="P133"/>
      <text:p text:style-name="P134">When <text:span text:style-name="T165">any </text:span><text:span text:style-name="T166">user </text:span>clicks on the <text:span text:style-name="T167">blue</text:span> <text:span text:style-name="T168">SpiritForm</text:span><text:span text:style-name="T169">s</text:span><text:span text:style-name="T168"> </text:span><text:span text:style-name="T170">Investigations</text:span><text:span text:style-name="T171"> </text:span>button <text:span text:style-name="T172">from User Home</text:span>, they see the <text:span text:style-name="T27">Investigations</text:span> ‘Browse’ form. This is the list of all SpiritForm<text:span text:style-name="T173">s</text:span> <text:span text:style-name="T27">Investigations and their related cases</text:span>. </text:p>
      <text:p text:style-name="P134"/>
      <text:p text:style-name="P134"><draw:frame draw:style-name="fr3" draw:name="Image3" text:anchor-type="char" svg:width="6.9252in" svg:height="2.4701in" draw:z-index="4"><draw:image xlink:href="Pictures/1000000000000590000001FC387FCD29.png" xlink:type="simple" xlink:show="embed" xlink:actuate="onLoad" draw:mime-type="image/png"/></draw:frame></text:p>
      <text:p text:style-name="P135"/>
      <text:p text:style-name="P135">From here, globeadmin (and ‘Admin’ <text:span text:style-name="T174">users</text:span>) can browse most <text:span text:style-name="T175">of</text:span> the data for every <text:span text:style-name="T27">investigation</text:span>. At a glance, you can see details quickly for every case. Both globeadmin and Admin users can <text:span text:style-name="T176">Search, Add and Export </text:span><text:span text:style-name="T27">investigations</text:span><text:span text:style-name="T176">. </text:span><text:span text:style-name="T165">Client users, however, can only </text:span><text:span text:style-name="T177">export their own investigations</text:span><text:span text:style-name="T165"> data. This is by design.</text:span></text:p>
      <text:p text:style-name="P135"/>
      <text:p text:style-name="P135"/>
      <text:p text:style-name="P135"/>
      <text:p text:style-name="P135"><draw:frame draw:style-name="fr2" draw:name="Image4" text:anchor-type="char" svg:x="1.3402in" svg:y="0.1in" svg:width="4.0575in" svg:height="1.7618in" draw:z-index="5"><draw:image xlink:href="Pictures/10000000000001F200000107059D3CDE.png" xlink:type="simple" xlink:show="embed" xlink:actuate="onLoad" draw:mime-type="image/png"/></draw:frame></text:p>
      <text:p text:style-name="P136"/>
      <text:p text:style-name="P137"/>
      <text:p text:style-name="P137"/>
      <text:p text:style-name="P138"><text:soft-page-break/><text:span text:style-name="Strong_20_Emphasis"><text:span text:style-name="T178"/></text:span></text:p>
      <text:p text:style-name="P139"><text:span text:style-name="Strong_20_Emphasis"><text:span text:style-name="T178">Investigations Reports</text:span></text:span></text:p>
      <text:p text:style-name="P140"><text:span text:style-name="Strong_20_Emphasis"><text:span text:style-name="T179">When globeadmin clicks on the Investigations Reports button, he/she sees all Reports. </text:span></text:span><text:span text:style-name="Strong_20_Emphasis"><text:span text:style-name="T180">Admin users can browse and view reports, but do not have permissions to create them unless specifically given access to </text:span></text:span><text:span text:style-name="Strong_20_Emphasis"><text:span text:style-name="T181">Tiny File Manager</text:span></text:span><text:span text:style-name="Strong_20_Emphasis"><text:span text:style-name="T180"> which is required for reports.</text:span></text:span></text:p>
      <text:p text:style-name="P121"><draw:frame draw:style-name="fr2" draw:name="Image9" text:anchor-type="char" svg:x="-0.0409in" svg:y="-0.0945in" svg:width="4.2402in" svg:height="4.2098in" draw:z-index="7"><draw:image xlink:href="Pictures/10000001000002B2000002AD06E8DFC7.png" xlink:type="simple" xlink:show="embed" xlink:actuate="onLoad" draw:mime-type="image/png"/></draw:frame><text:span text:style-name="Strong_20_Emphasis"><text:span text:style-name="T182"/></text:span></text:p>
      <text:p text:style-name="P121"><text:span text:style-name="Strong_20_Emphasis"><text:span text:style-name="T182"/></text:span></text:p>
      <text:p text:style-name="P121"><text:span text:style-name="Strong_20_Emphasis"><text:span text:style-name="T182"/></text:span></text:p>
      <text:p text:style-name="P121"><text:span text:style-name="Strong_20_Emphasis"><text:span text:style-name="T182"/></text:span></text:p>
      <text:p text:style-name="P121"><text:span text:style-name="Strong_20_Emphasis"><text:span text:style-name="T182"/></text:span></text:p>
      <text:p text:style-name="P121"><text:span text:style-name="Strong_20_Emphasis"><text:span text:style-name="T182"/></text:span></text:p>
      <text:p text:style-name="P121"><text:span text:style-name="Strong_20_Emphasis"><text:span text:style-name="T182"/></text:span></text:p>
      <text:p text:style-name="P121"><text:span text:style-name="Strong_20_Emphasis"><text:span text:style-name="T182"/></text:span></text:p>
      <text:p text:style-name="P121"><text:span text:style-name="Strong_20_Emphasis"><text:span text:style-name="T182"/></text:span></text:p>
      <text:p text:style-name="P121"><text:span text:style-name="Strong_20_Emphasis"><text:span text:style-name="T182"/></text:span></text:p>
      <text:p text:style-name="P121"><text:span text:style-name="Strong_20_Emphasis"><text:span text:style-name="T182"/></text:span></text:p>
      <text:p text:style-name="P121"><text:span text:style-name="Strong_20_Emphasis"><text:span text:style-name="T182"/></text:span></text:p>
      <text:p text:style-name="P121"><text:span text:style-name="Strong_20_Emphasis"><text:span text:style-name="T182"/></text:span></text:p>
      <text:p text:style-name="P121"><text:span text:style-name="Strong_20_Emphasis"><text:span text:style-name="T182">When clients are logged in, they see only Reports that are marked as ‘Complete’.</text:span></text:span></text:p>
      <text:p text:style-name="P120"><text:span text:style-name="Strong_20_Emphasis"><text:span text:style-name="T157"/></text:span></text:p>
      <text:p text:style-name="P141"><text:span text:style-name="Strong_20_Emphasis"><text:span text:style-name="T183">Client User Home</text:span></text:span></text:p>
      <text:p text:style-name="P141"><text:span text:style-name="Strong_20_Emphasis"><text:span text:style-name="T183"/></text:span></text:p>
      <text:p text:style-name="P142"><draw:frame draw:style-name="fr2" draw:name="Image11" text:anchor-type="char" svg:x="1.5772in" svg:y="0.0555in" svg:width="2.5736in" svg:height="2.5701in" draw:z-index="9"><draw:image xlink:href="Pictures/1000000100000112000001605E104E76.png" xlink:type="simple" xlink:show="embed" xlink:actuate="onLoad" draw:mime-type="image/png"/></draw:frame></text:p>
      <text:p text:style-name="P142"/>
      <text:p text:style-name="P142"/>
      <text:p text:style-name="P142"/>
      <text:p text:style-name="P142"/>
      <text:p text:style-name="P142"/>
      <text:p text:style-name="P142"/>
      <text:p text:style-name="P142"><text:span text:style-name="Strong_20_Emphasis"><text:span text:style-name="T184"/></text:span></text:p>
      <text:p text:style-name="P142"><text:span text:style-name="Strong_20_Emphasis"><text:span text:style-name="T184"/></text:span></text:p>
      <text:p text:style-name="P142"><text:soft-page-break/><text:span text:style-name="Strong_20_Emphasis"><text:span text:style-name="T184"/></text:span></text:p>
      <text:p text:style-name="P142"><text:span text:style-name="Strong_20_Emphasis"><text:span text:style-name="T185"/></text:span></text:p>
      <text:p text:style-name="P142"><text:span text:style-name="Strong_20_Emphasis"><text:span text:style-name="T185"/></text:span></text:p>
      <text:p text:style-name="P142"><text:span text:style-name="Strong_20_Emphasis"><text:span text:style-name="T185"/></text:span></text:p>
      <text:p text:style-name="P142"><text:span text:style-name="Strong_20_Emphasis"><text:span text:style-name="T185"/></text:span></text:p>
      <text:p text:style-name="P142"><text:span text:style-name="Strong_20_Emphasis"><text:span text:style-name="T185"/></text:span></text:p>
      <text:p text:style-name="P143"><text:span text:style-name="Strong_20_Emphasis"><text:span text:style-name="T186">Client User SpiritForms Investigations</text:span></text:span></text:p>
      <text:p text:style-name="P142"><text:span text:style-name="Strong_20_Emphasis"><text:span text:style-name="T185"/></text:span></text:p>
      <text:p text:style-name="P142"><text:span text:style-name="Strong_20_Emphasis"><text:span text:style-name="T185">When Client users access the SpiritForms Investigations area, they see only the investigations that are associated with their case(s). </text:span></text:span><text:span text:style-name="Strong_20_Emphasis"><text:span text:style-name="T187">For example, in the image below, we see that ‘</text:span></text:span><text:span text:style-name="Strong_20_Emphasis"><text:span text:style-name="T188">C</text:span></text:span><text:span text:style-name="Strong_20_Emphasis"><text:span text:style-name="T187">lient </text:span></text:span><text:span text:style-name="Strong_20_Emphasis"><text:span text:style-name="T188">O</text:span></text:span><text:span text:style-name="Strong_20_Emphasis"><text:span text:style-name="T187">ne’ sees investigations for two different cases that are associated with them. </text:span></text:span></text:p>
      <text:p text:style-name="P142"><text:span text:style-name="Strong_20_Emphasis"><text:span text:style-name="T187"/></text:span></text:p>
      <text:p text:style-name="P142"><draw:custom-shape text:anchor-type="paragraph" draw:z-index="11" draw:name="Shape 1" draw:style-name="gr2" draw:text-style-name="P144" svg:width="0.4898in" svg:height="0.3961in" svg:x="1.8689in" svg:y="0.32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frame draw:style-name="fr4" draw:name="Image12" text:anchor-type="char" svg:width="6.9252in" svg:height="3.0661in" draw:z-index="10"><draw:image xlink:href="Pictures/100000010000032400000164540B4EB8.png" xlink:type="simple" xlink:show="embed" xlink:actuate="onLoad" draw:mime-type="image/png"/></draw:frame><text:span text:style-name="Strong_20_Emphasis"><text:span text:style-name="T187"><text:s/></text:span></text:span></text:p>
      <text:p text:style-name="P145"><text:span text:style-name="Strong_20_Emphasis"><text:span text:style-name="T189">When a Client user clicks on any of the investigations, an ‘Access Denied’ message appears. This is by design. We don’t want clients changing any data. </text:span></text:span><text:span text:style-name="Strong_20_Emphasis"><text:span text:style-name="T190">However, Client users have permissions to </text:span></text:span><text:span text:style-name="Strong_20_Emphasis"><text:span text:style-name="T191">download</text:span></text:span><text:span text:style-name="Strong_20_Emphasis"><text:span text:style-name="T190"> all of the </text:span></text:span><text:span text:style-name="Strong_20_Emphasis"><text:span text:style-name="T192">investigations </text:span></text:span><text:span text:style-name="Strong_20_Emphasis"><text:span text:style-name="T190">data associated with all of the</text:span></text:span><text:span text:style-name="Strong_20_Emphasis"><text:span text:style-name="T192">ir case</text:span></text:span><text:span text:style-name="Strong_20_Emphasis"><text:span text:style-name="T190">(s) by clicking on the Print icon (</text:span></text:span><text:span text:style-name="Strong_20_Emphasis"><text:span text:style-name="T193">highlighted in red above</text:span></text:span><text:span text:style-name="Strong_20_Emphasis"><text:span text:style-name="T190">). When Client users click on the Print button, they are presented with a new browser tab.</text:span></text:span></text:p>
      <text:p text:style-name="P145"><draw:frame draw:style-name="fr3" draw:name="Image13" text:anchor-type="char" svg:width="6.9252in" svg:height="2.578in" draw:z-index="12"><draw:image xlink:href="Pictures/1000000000000738000002B0E4F6E82D.png" xlink:type="simple" xlink:show="embed" xlink:actuate="onLoad" draw:mime-type="image/png"/></draw:frame><text:span text:style-name="Strong_20_Emphasis"><text:span text:style-name="T190"><text:s/></text:span></text:span><text:span text:style-name="T190"/></text:p>
      <text:p text:style-name="P146"><text:soft-page-break/><text:span text:style-name="Strong_20_Emphasis"><text:span text:style-name="T194">There will be a blue icon in the upper left corner of the new window </text:span></text:span><text:span text:style-name="Strong_20_Emphasis"><text:span text:style-name="T195">(highlighted in red above)</text:span></text:span><text:span text:style-name="Strong_20_Emphasis"><text:span text:style-name="T194">. When the Client user clicks on this button, the data will be copied to the clipboard and this message will appear:</text:span></text:span></text:p>
      <text:p text:style-name="P146"><draw:frame draw:style-name="fr5" draw:name="Image14" text:anchor-type="char" svg:width="6.9252in" svg:height="0.7264in" draw:z-index="13"><draw:image xlink:href="Pictures/100000010000030400000051882C9D17.png" xlink:type="simple" xlink:show="embed" xlink:actuate="onLoad" draw:mime-type="image/png"/></draw:frame><text:span text:style-name="Strong_20_Emphasis"><text:span text:style-name="T194"><text:s/></text:span></text:span></text:p>
      <text:p text:style-name="P147"><text:span text:style-name="Strong_20_Emphasis"><text:span text:style-name="T195">To save the data, the user must have either </text:span></text:span></text:p>
      <text:p text:style-name="P147"><text:span text:style-name="Strong_20_Emphasis"><text:span text:style-name="T195">1. Microsoft Excel or</text:span></text:span></text:p>
      <text:p text:style-name="P147"><text:span text:style-name="Strong_20_Emphasis"><text:span text:style-name="T195">2. LibreOffice Calc (free)</text:span></text:span></text:p>
      <text:p text:style-name="P147"><text:span text:style-name="Strong_20_Emphasis"><text:span text:style-name="T195">installed on their computer.</text:span></text:span></text:p>
      <text:p text:style-name="P147"><text:span text:style-name="Strong_20_Emphasis"><text:span text:style-name="T195"/></text:span></text:p>
      <text:p text:style-name="P147"><text:span text:style-name="Strong_20_Emphasis"><text:span text:style-name="T195">With either of the two clients installed, the user can then:</text:span></text:span></text:p>
      <text:p text:style-name="P147"><text:span text:style-name="Strong_20_Emphasis"><text:span text:style-name="T195">1. open a new Excel or Calc document</text:span></text:span></text:p>
      <text:p text:style-name="P147"><text:span text:style-name="Strong_20_Emphasis"><text:span text:style-name="T195">2. paste the data into the new document (CTRL-V).</text:span></text:span></text:p>
      <text:p text:style-name="P147"><text:span text:style-name="Strong_20_Emphasis"><text:span text:style-name="T195"/></text:span></text:p>
      <text:p text:style-name="P147"><text:span text:style-name="Strong_20_Emphasis"><text:span text:style-name="T195">Within the browser window, Hyperlinks to the individual multimedia documents and .zip files will allow the Client user to either <text:s/>download the evidence files individually or download the .zip files to their computer. </text:span></text:span></text:p>
      <text:p text:style-name="P147"><text:span text:style-name="Strong_20_Emphasis"><text:span text:style-name="T195"/></text:span></text:p>
      <text:p text:style-name="P143"><text:span text:style-name="Strong_20_Emphasis"><text:span text:style-name="T196">Client User SpiritForms Reports</text:span></text:span></text:p>
      <text:p text:style-name="P143"><text:span text:style-name="Strong_20_Emphasis"><text:span text:style-name="T186"/></text:span></text:p>
      <text:p text:style-name="P143"><text:span text:style-name="Strong_20_Emphasis"><text:span text:style-name="T197">When the Client user clicks on the </text:span></text:span><text:span text:style-name="Strong_20_Emphasis"><text:span text:style-name="T186">SpiritForms Reports </text:span></text:span><text:span text:style-name="Strong_20_Emphasis"><text:span text:style-name="T197">button, they are taken to the list of Reports that have been completed. </text:span></text:span><text:span text:style-name="Strong_20_Emphasis"><text:span text:style-name="T198">If the Report for an investigation is not marked as complete, it will not be available to the client.</text:span></text:span></text:p>
      <text:p text:style-name="P143"><text:span text:style-name="Strong_20_Emphasis"><text:span text:style-name="T197"/></text:span></text:p>
      <text:p text:style-name="P143"><draw:frame draw:style-name="fr2" draw:name="Image15" text:anchor-type="char" svg:x="-0.0453in" svg:y="0.0791in" svg:width="3.7252in" svg:height="3.8535in" draw:z-index="14"><draw:image xlink:href="Pictures/100000010000027F000002956E85D488.png" xlink:type="simple" xlink:show="embed" xlink:actuate="onLoad" draw:mime-type="image/png"/></draw:frame><text:span text:style-name="Strong_20_Emphasis"><text:span text:style-name="T197"/></text:span></text:p>
      <text:p text:style-name="P143"><text:span text:style-name="Strong_20_Emphasis"><text:span text:style-name="T197"/></text:span></text:p>
      <text:p text:style-name="P143"><text:span text:style-name="Strong_20_Emphasis"><text:span text:style-name="T197"/></text:span></text:p>
      <text:p text:style-name="P143"><text:span text:style-name="Strong_20_Emphasis"><text:span text:style-name="T197"/></text:span></text:p>
      <text:p text:style-name="P143"><text:span text:style-name="Strong_20_Emphasis"><text:span text:style-name="T197"/></text:span></text:p>
      <text:p text:style-name="P143"><text:span text:style-name="Strong_20_Emphasis"><text:span text:style-name="T197"/></text:span></text:p>
      <text:p text:style-name="P143"><text:span text:style-name="Strong_20_Emphasis"><text:span text:style-name="T197"/></text:span></text:p>
      <text:p text:style-name="P143"><text:span text:style-name="Strong_20_Emphasis"><text:span text:style-name="T197"/></text:span></text:p>
      <text:p text:style-name="P143"><text:span text:style-name="Strong_20_Emphasis"><text:span text:style-name="T197"/></text:span></text:p>
      <text:p text:style-name="P143"><text:span text:style-name="Strong_20_Emphasis"><text:span text:style-name="T197"/></text:span></text:p>
      <text:p text:style-name="P143"><text:span text:style-name="Strong_20_Emphasis"><text:span text:style-name="T197"/></text:span></text:p>
      <text:p text:style-name="P143"><text:span text:style-name="Strong_20_Emphasis"><text:span text:style-name="T197"/></text:span></text:p>
      <text:p text:style-name="P143"><text:span text:style-name="Strong_20_Emphasis"><text:span text:style-name="T197"/></text:span></text:p>
      <text:p text:style-name="P143"><text:span text:style-name="Strong_20_Emphasis"><text:span text:style-name="T197"/></text:span></text:p>
      <text:p text:style-name="P143"><text:span text:style-name="Strong_20_Emphasis"><text:span text:style-name="T197"/></text:span></text:p>
      <text:p text:style-name="P143"><text:span text:style-name="Strong_20_Emphasis"><text:span text:style-name="T197"/></text:span></text:p>
      <text:p text:style-name="P143"><text:span text:style-name="Strong_20_Emphasis"><text:span text:style-name="T197"/></text:span></text:p>
      <text:p text:style-name="P143"><text:span text:style-name="Strong_20_Emphasis"><text:span text:style-name="T197"/></text:span></text:p>
      <text:p text:style-name="P143"><text:span text:style-name="Strong_20_Emphasis"><text:span text:style-name="T197"/></text:span></text:p>
      <text:p text:style-name="P143"><text:span text:style-name="Strong_20_Emphasis"><text:span text:style-name="T199"/></text:span></text:p>
      <text:p text:style-name="P143"><text:span text:style-name="Strong_20_Emphasis"><text:span text:style-name="T199"/></text:span></text:p>
      <text:p text:style-name="P143"><text:span text:style-name="Strong_20_Emphasis"><text:span text:style-name="T199"/></text:span></text:p>
      <text:p text:style-name="P143"><text:soft-page-break/><text:span text:style-name="Strong_20_Emphasis"><text:span text:style-name="T199"/></text:span></text:p>
      <text:p text:style-name="P143"><text:span text:style-name="Strong_20_Emphasis"><text:span text:style-name="T199"/></text:span></text:p>
      <text:p text:style-name="P143"><text:span text:style-name="Strong_20_Emphasis"><text:span text:style-name="T199"/></text:span></text:p>
      <text:p text:style-name="P148"><text:span text:style-name="Strong_20_Emphasis"><text:span text:style-name="T200">When a Client user clicks on one of the Reports from this window, another window will appear.<text:tab/><text:tab/></text:span></text:span><draw:frame draw:style-name="fr2" draw:name="Image16" text:anchor-type="char" svg:x="0.0035in" svg:y="0.2972in" svg:width="4.0366in" svg:height="2.4626in" draw:z-index="15"><draw:image xlink:href="Pictures/10000001000001B90000010D14F222A4.png" xlink:type="simple" xlink:show="embed" xlink:actuate="onLoad" draw:mime-type="image/png"/></draw:frame><text:span text:style-name="Strong_20_Emphasis"><text:span text:style-name="T200"><text:tab/><text:tab/><text:tab/><text:tab/><text:tab/><text:tab/><text:tab/></text:span></text:span></text:p>
      <text:p text:style-name="P148"/>
      <text:p text:style-name="P148"/>
      <text:p text:style-name="P148"/>
      <text:p text:style-name="P148"/>
      <text:p text:style-name="P148"/>
      <text:p text:style-name="P148"/>
      <text:p text:style-name="P148"/>
      <text:p text:style-name="P148"/>
      <text:p text:style-name="P148"/>
      <text:p text:style-name="P148"/>
      <text:p text:style-name="P149">Clicking on the ‘View Report’ button will open the Report in a new browser tab.</text:p>
      <text:p text:style-name="P149"><draw:frame draw:style-name="fr2" draw:name="Image17" text:anchor-type="char" svg:x="0.0516in" svg:y="0.1398in" svg:width="3.5591in" svg:height="5.448in" draw:z-index="16"><draw:image xlink:href="Pictures/100000010000028C000003E6301F80B7.png" xlink:type="simple" xlink:show="embed" xlink:actuate="onLoad" draw: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p>
      <text:p text:style-name="P149"/>
      <text:p text:style-name="P149"/>
      <text:p text:style-name="P150"/>
      <text:p text:style-name="P150">If the Client user has properly installed and configured the ‘<text:span text:style-name="T11">Capture Page Chrome Extension’, </text:span>they will see an ‘S’ icon <text:s/>in the upper left of the Chrome browser.</text:p>
      <text:p text:style-name="P150"><draw:frame draw:style-name="fr2" draw:name="Image18" text:anchor-type="char" svg:x="0.0236in" svg:y="0.1756in" svg:width="0.3854in" svg:height="0.4063in" draw:z-index="17"><draw:image xlink:href="Pictures/100000010000002500000027932E273A.png" xlink:type="simple" xlink:show="embed" xlink:actuate="onLoad" draw:mime-type="image/png"/></draw:frame></text:p>
      <text:p text:style-name="P150"><text:s/></text:p>
      <text:p text:style-name="P150"/>
      <text:p text:style-name="P150"/>
      <text:p text:style-name="P150">Clicking on this icon will display the ‘Capture page as ZIP’ button. Clicking on the ‘Capture page as ZIP’ button will launch the Report capture and download sequence. Once the capture and download is complete, there will be a message ‘Capture Complete. Zip downloaded.’ followed by a new download window that will allow the user to save the .zip file. The files can then be extracted from the .zip file for viewing the Report on the users’ computer.</text:p>
      <text:p text:style-name="P150"/>
      <text:p text:style-name="P150"/>
      <text:p text:style-name="P151">Tiny File Manager <text:span text:style-name="T201">(Uploading files)</text:span></text:p>
      <text:p text:style-name="P152"/>
      <text:p text:style-name="P153">As previously stated (see <text:span text:style-name="T202">User Access to Tiny File Manager (Advanced / High-Risk)</text:span><text:span text:style-name="T203">)</text:span>, access to Tiny File Manager (which allows for upload<text:span text:style-name="T201">ing files</text:span> to the server) only exists for globeadmin and specific users who have been granted this special access. This section outlines the use of Tiny File Manager in SpiritForms.</text:p>
      <text:p text:style-name="P153"/>
      <text:p text:style-name="P153">When Investigations are created, SpiritForms automatically creates upload folders for each investigation at the same time. Each investigation then has its own set of <text:span text:style-name="T201">upload </text:span>folders. For example, case 12 folders are:</text:p>
      <text:p text:style-name="P153"/>
      <text:p text:style-name="P153">/uploads/Investigation 12/Evidence/</text:p>
      <text:p text:style-name="P153">/uploads/Investigation 12/Evidence/Audio</text:p>
      <text:p text:style-name="P153">/uploads/Investigation 12/Evidence/Video</text:p>
      <text:p text:style-name="P153">/uploads/Investigation 12/Evidence/Photo</text:p>
      <text:p text:style-name="P153">/uploads/Investigation <text:span text:style-name="T201">12</text:span>/History/</text:p>
      <text:p text:style-name="P153"><text:s text:c="8"/></text:p>
      <text:p text:style-name="P154">When a user with Tiny File Manager credentials clicks the ‘Upload Audio Files’ button, the<text:span text:style-name="T204">y</text:span> are automatically taken to the Audio folder for that investigation. The same applies when uploading videos, <text:span text:style-name="T201">p</text:span>hotos, <text:span text:style-name="T201">and history documents.</text:span></text:p>
      <text:p text:style-name="P154"><draw:frame draw:style-name="fr5" draw:name="Image19" text:anchor-type="char" svg:width="6.9252in" svg:height="1.7508in" draw:z-index="18"><draw:image xlink:href="Pictures/100000010000077A000001E420213F5B.png" xlink:type="simple" xlink:show="embed" xlink:actuate="onLoad" draw:mime-type="image/png"/></draw:frame></text:p>
      <text:p text:style-name="P155"><text:soft-page-break/>To the left is the list of audio files that have been uploaded. To the right, there are ‘Actions’ icons that represent what the user can do with each file. Right-clicking on the link icon allows copying the hyperlink to that selected file. The other buttons are self-explanatory. Play with it. Learn what you can do by using it. <text:span text:style-name="T205">It is a powerful tool and it is </text:span>easy <text:span text:style-name="T206">to use </text:span>– not rocket sci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Trebuchet MS', Verdana, Helvetica, Arial, sans-serif"/>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6T17:59:27.914835600</meta:creation-date>
    <dc:date>2026-01-21T16:54:34.863695400</dc:date>
    <meta:editing-duration>PT16H8M45S</meta:editing-duration>
    <meta:editing-cycles>211</meta:editing-cycles>
    <meta:generator>LibreOffice/25.8.3.2$Windows_X86_64 LibreOffice_project/8ca8d55c161d602844f5428fa4b58097424e324e</meta:generator>
    <meta:document-statistic meta:table-count="0" meta:image-count="19" meta:object-count="0" meta:page-count="22" meta:paragraph-count="270" meta:word-count="4425" meta:character-count="27391" meta:non-whitespace-character-count="23166"/>
  </office:meta>
</office:document-meta>
</file>