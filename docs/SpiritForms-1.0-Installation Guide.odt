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E300000138F45675FB.png" manifest:media-type="image/png"/>
  <manifest:file-entry manifest:full-path="Pictures/10000001000004830000024B4DFAED95.png" manifest:media-type="image/png"/>
  <manifest:file-entry manifest:full-path="Pictures/1000000000000258000002582A4566DB.jpg" manifest:media-type="image/jpeg"/>
  <manifest:file-entry manifest:full-path="Pictures/10000001000002DA000002C8E87E7358.png" manifest:media-type="image/png"/>
  <manifest:file-entry manifest:full-path="Pictures/100000010000001B000000162330027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8e4f" officeooo:paragraph-rsid="00038e4f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38e4f" officeooo:paragraph-rsid="00038e4f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officeooo:rsid="00038e4f" officeooo:paragraph-rsid="00038e4f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officeooo:rsid="00096edd" officeooo:paragraph-rsid="00096edd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8pt" officeooo:rsid="0005a12f" officeooo:paragraph-rsid="0005a12f" style:font-size-asian="8pt" style:font-size-complex="8pt"/>
    </style:style>
    <style:style style:name="P6" style:family="paragraph" style:parent-style-name="Standard">
      <style:text-properties officeooo:rsid="00038e4f" officeooo:paragraph-rsid="00038e4f"/>
    </style:style>
    <style:style style:name="P7" style:family="paragraph" style:parent-style-name="Standard">
      <style:text-properties officeooo:rsid="00079827" officeooo:paragraph-rsid="00038e4f"/>
    </style:style>
    <style:style style:name="P8" style:family="paragraph" style:parent-style-name="Standard">
      <style:paragraph-properties fo:break-before="page"/>
      <style:text-properties fo:font-size="20pt" fo:font-weight="bold" officeooo:rsid="000bba56" officeooo:paragraph-rsid="000bba56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12pt" fo:font-weight="bold" officeooo:rsid="000bba56" officeooo:paragraph-rsid="000bba56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normal" officeooo:rsid="000c4e18" officeooo:paragraph-rsid="000c4e18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6pt" fo:font-weight="bold" officeooo:rsid="000c4e18" officeooo:paragraph-rsid="000c4e18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bold" officeooo:rsid="000c4e18" officeooo:paragraph-rsid="000c4e18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normal" officeooo:rsid="000bba56" officeooo:paragraph-rsid="000bba56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0c8e24" officeooo:paragraph-rsid="000c8e24" style:font-size-asian="10.5pt" style:font-weight-asian="normal" style:font-size-complex="12pt" style:font-weight-complex="normal"/>
    </style:style>
    <style:style style:name="P15" style:family="paragraph" style:parent-style-name="Standard">
      <style:text-properties officeooo:paragraph-rsid="000d0e15"/>
    </style:style>
    <style:style style:name="P16" style:family="paragraph" style:parent-style-name="Standard">
      <style:text-properties fo:font-size="12pt" fo:font-weight="normal" officeooo:rsid="00123e59" officeooo:paragraph-rsid="00123e59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0bba56" officeooo:paragraph-rsid="000d0e15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d0e15" officeooo:paragraph-rsid="000d0e1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0c4e18" officeooo:paragraph-rsid="000d0e15" style:font-size-asian="10.5pt" style:font-weight-asian="normal" style:font-size-complex="12pt" style:font-weight-complex="normal"/>
    </style:style>
    <style:style style:name="P20" style:family="paragraph" style:parent-style-name="Standard">
      <style:text-properties officeooo:paragraph-rsid="00123e59"/>
    </style:style>
    <style:style style:name="P21" style:family="paragraph" style:parent-style-name="Standard">
      <style:text-properties fo:font-size="12pt" fo:font-weight="normal" officeooo:rsid="002de796" officeooo:paragraph-rsid="00123e59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2de796" officeooo:paragraph-rsid="002de796" style:font-size-asian="10.5pt" style:font-weight-asian="normal" style:font-size-complex="12pt" style:font-weight-complex="normal"/>
    </style:style>
    <style:style style:name="P23" style:family="paragraph" style:parent-style-name="Standard">
      <style:text-properties officeooo:paragraph-rsid="002de796"/>
    </style:style>
    <style:style style:name="P24" style:family="paragraph" style:parent-style-name="Standard">
      <style:text-properties officeooo:rsid="002e4b97" officeooo:paragraph-rsid="002e4b97"/>
    </style:style>
    <style:style style:name="P25" style:family="paragraph" style:parent-style-name="Standard">
      <style:text-properties officeooo:paragraph-rsid="000f5f05"/>
    </style:style>
    <style:style style:name="P26" style:family="paragraph" style:parent-style-name="Standard">
      <style:text-properties officeooo:rsid="000f5f05" officeooo:paragraph-rsid="000f5f05"/>
    </style:style>
    <style:style style:name="P27" style:family="paragraph" style:parent-style-name="Standard">
      <style:text-properties fo:color="#000000" loext:opacity="100%" officeooo:rsid="002e4b97" officeooo:paragraph-rsid="002e4b97"/>
    </style:style>
    <style:style style:name="P28" style:family="paragraph" style:parent-style-name="Standard">
      <style:text-properties fo:color="#000000" loext:opacity="100%" officeooo:rsid="00135b80" officeooo:paragraph-rsid="002e4b97"/>
    </style:style>
    <style:style style:name="P29" style:family="paragraph" style:parent-style-name="Standard">
      <style:text-properties fo:color="#000000" loext:opacity="100%" officeooo:rsid="0014a5d9" officeooo:paragraph-rsid="002e4b97"/>
    </style:style>
    <style:style style:name="P30" style:family="paragraph" style:parent-style-name="Standard">
      <style:text-properties fo:color="#000000" loext:opacity="100%" officeooo:rsid="0014a5d9" officeooo:paragraph-rsid="0014a5d9"/>
    </style:style>
    <style:style style:name="P31" style:family="paragraph" style:parent-style-name="Standard">
      <style:text-properties fo:color="#000000" loext:opacity="100%" officeooo:rsid="00135b80" officeooo:paragraph-rsid="00135b80"/>
    </style:style>
    <style:style style:name="P32" style:family="paragraph" style:parent-style-name="Standard">
      <style:text-properties fo:color="#000000" loext:opacity="100%" officeooo:rsid="000f5f05" officeooo:paragraph-rsid="000f5f05"/>
    </style:style>
    <style:style style:name="P33" style:family="paragraph" style:parent-style-name="Standard">
      <style:text-properties fo:color="#000000" loext:opacity="100%" officeooo:rsid="0014f4a5" officeooo:paragraph-rsid="0014f4a5"/>
    </style:style>
    <style:style style:name="P34" style:family="paragraph" style:parent-style-name="Standard">
      <style:text-properties fo:color="#000000" loext:opacity="100%" officeooo:rsid="0016e1c8" officeooo:paragraph-rsid="0016e1c8"/>
    </style:style>
    <style:style style:name="P35" style:family="paragraph" style:parent-style-name="Standard">
      <style:text-properties fo:color="#000000" loext:opacity="100%" fo:font-size="16pt" fo:font-weight="bold" officeooo:rsid="0028dedc" officeooo:paragraph-rsid="0028dedc" style:font-size-asian="16pt" style:font-weight-asian="bold" style:font-size-complex="16pt" style:font-weight-complex="bold"/>
    </style:style>
    <style:style style:name="P36" style:family="paragraph" style:parent-style-name="Standard">
      <style:text-properties fo:color="#000000" loext:opacity="100%" officeooo:rsid="0028dedc" officeooo:paragraph-rsid="0028dedc"/>
    </style:style>
    <style:style style:name="P37" style:family="paragraph" style:parent-style-name="Standard">
      <style:text-properties fo:color="#000000" loext:opacity="100%" fo:font-weight="bold" officeooo:rsid="0028dedc" officeooo:paragraph-rsid="0028dedc" style:font-weight-asian="bold" style:font-weight-complex="bold"/>
    </style:style>
    <style:style style:name="P38" style:family="paragraph" style:parent-style-name="Standard">
      <style:text-properties fo:color="#000000" loext:opacity="100%" fo:font-size="14pt" fo:font-weight="bold" officeooo:rsid="0028dedc" officeooo:paragraph-rsid="0028dedc" style:font-size-asian="14pt" style:font-weight-asian="bold" style:font-size-complex="14pt" style:font-weight-complex="bold"/>
    </style:style>
    <style:style style:name="P39" style:family="paragraph" style:parent-style-name="Standard">
      <style:text-properties fo:color="#000000" loext:opacity="100%" fo:font-size="12pt" fo:font-weight="normal" officeooo:rsid="003b0323" officeooo:paragraph-rsid="003b0323" style:font-size-asian="12pt" style:font-weight-asian="normal" style:font-size-complex="12pt" style:font-weight-complex="normal"/>
    </style:style>
    <style:style style:name="P40" style:family="paragraph" style:parent-style-name="Standard">
      <style:text-properties fo:color="#000000" loext:opacity="100%" fo:font-weight="normal" officeooo:rsid="0028dedc" officeooo:paragraph-rsid="0028dedc" style:font-weight-asian="normal" style:font-weight-complex="normal"/>
    </style:style>
    <style:style style:name="P41" style:family="paragraph" style:parent-style-name="Standard">
      <style:text-properties fo:color="#000000" loext:opacity="100%" fo:font-size="16pt" fo:font-weight="bold" officeooo:rsid="001c8287" officeooo:paragraph-rsid="0028dedc" style:font-size-asian="16pt" style:font-weight-asian="bold" style:font-size-complex="16pt" style:font-weight-complex="bold"/>
    </style:style>
    <style:style style:name="P42" style:family="paragraph" style:parent-style-name="Standard">
      <style:text-properties fo:color="#000000" loext:opacity="100%" fo:font-size="12pt" fo:font-weight="normal" officeooo:rsid="001c8287" officeooo:paragraph-rsid="0028dedc" style:font-size-asian="12pt" style:font-weight-asian="normal" style:font-size-complex="12pt" style:font-weight-complex="normal"/>
    </style:style>
    <style:style style:name="P43" style:family="paragraph" style:parent-style-name="Standard">
      <style:text-properties fo:color="#000000" loext:opacity="100%" fo:font-size="16pt" fo:font-weight="bold" officeooo:rsid="001c8287" officeooo:paragraph-rsid="001c8287" style:font-size-asian="16pt" style:font-weight-asian="bold" style:font-size-complex="16pt" style:font-weight-complex="bold"/>
    </style:style>
    <style:style style:name="P44" style:family="paragraph" style:parent-style-name="Standard">
      <style:text-properties fo:color="#000000" loext:opacity="100%" fo:font-size="12pt" fo:font-weight="normal" officeooo:rsid="001c8287" officeooo:paragraph-rsid="001c8287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color="#000000" loext:opacity="100%" officeooo:rsid="001dd7dd" officeooo:paragraph-rsid="001dd7dd"/>
    </style:style>
    <style:style style:name="P46" style:family="paragraph" style:parent-style-name="Standard">
      <style:text-properties fo:color="#000000" loext:opacity="100%" fo:font-size="16pt" fo:font-weight="bold" officeooo:rsid="0021a871" officeooo:paragraph-rsid="0021a871" style:font-size-asian="16pt" style:font-weight-asian="bold" style:font-size-complex="16pt" style:font-weight-complex="bold"/>
    </style:style>
    <style:style style:name="P47" style:family="paragraph" style:parent-style-name="Standard">
      <style:text-properties fo:color="#000000" loext:opacity="100%" fo:font-size="12pt" fo:font-weight="normal" officeooo:rsid="0021a871" officeooo:paragraph-rsid="0021a871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color="#000000" loext:opacity="100%" fo:font-size="12pt" fo:font-weight="bold" officeooo:rsid="0021a871" officeooo:paragraph-rsid="0021a871" style:font-size-asian="10.5pt" style:font-weight-asian="bold" style:font-size-complex="12pt" style:font-weight-complex="bold"/>
    </style:style>
    <style:style style:name="P49" style:family="paragraph" style:parent-style-name="Standard">
      <style:text-properties fo:color="#000000" loext:opacity="100%" officeooo:rsid="0021a871" officeooo:paragraph-rsid="0021a871"/>
    </style:style>
    <style:style style:name="P50" style:family="paragraph" style:parent-style-name="Standard">
      <style:text-properties fo:color="#000000" loext:opacity="100%" fo:font-size="16pt" fo:font-weight="bold" officeooo:rsid="0016e1c8" officeooo:paragraph-rsid="0016e1c8" style:font-size-asian="16pt" style:font-weight-asian="bold" style:font-size-complex="16pt" style:font-weight-complex="bold"/>
    </style:style>
    <style:style style:name="P51" style:family="paragraph" style:parent-style-name="Standard">
      <style:text-properties fo:color="#000000" loext:opacity="100%" fo:font-size="12pt" fo:font-weight="normal" officeooo:rsid="0016e1c8" officeooo:paragraph-rsid="0016e1c8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color="#000000" loext:opacity="100%" fo:font-size="12pt" fo:font-weight="normal" officeooo:rsid="00187f99" officeooo:paragraph-rsid="00187f99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color="#000000" loext:opacity="100%" fo:font-size="12pt" fo:font-weight="normal" officeooo:rsid="00187f99" officeooo:paragraph-rsid="001b9cc4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color="#000000" loext:opacity="100%" fo:font-size="12pt" fo:font-weight="normal" officeooo:rsid="001936d4" officeooo:paragraph-rsid="001936d4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color="#000000" loext:opacity="100%" fo:font-size="12pt" fo:font-weight="normal" officeooo:rsid="001936d4" officeooo:paragraph-rsid="00199e19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color="#000000" loext:opacity="100%" fo:font-size="16pt" fo:font-weight="bold" officeooo:rsid="0016e1c8" officeooo:paragraph-rsid="0019afb3" style:font-size-asian="16pt" style:font-weight-asian="bold" style:font-size-complex="16pt" style:font-weight-complex="bold"/>
    </style:style>
    <style:style style:name="P57" style:family="paragraph" style:parent-style-name="Standard">
      <style:text-properties fo:color="#000000" loext:opacity="100%" fo:font-size="12pt" fo:font-weight="bold" officeooo:rsid="0016e1c8" officeooo:paragraph-rsid="0019afb3" style:font-size-asian="10.5pt" style:font-weight-asian="bold" style:font-size-complex="12pt" style:font-weight-complex="bold"/>
    </style:style>
    <style:style style:name="P58" style:family="paragraph" style:parent-style-name="Standard">
      <style:text-properties fo:color="#000000" loext:opacity="100%" fo:font-size="12pt" fo:font-weight="normal" officeooo:rsid="001ab374" officeooo:paragraph-rsid="001ab374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color="#000000" loext:opacity="100%" fo:font-size="12pt" fo:font-weight="bold" officeooo:rsid="001ab374" officeooo:paragraph-rsid="001ab374" style:font-size-asian="10.5pt" style:font-weight-asian="bold" style:font-size-complex="12pt" style:font-weight-complex="bold"/>
    </style:style>
    <style:style style:name="P60" style:family="paragraph" style:parent-style-name="Standard">
      <style:text-properties fo:color="#000000" loext:opacity="100%" fo:font-size="12pt" fo:font-weight="normal" officeooo:rsid="00242672" officeooo:paragraph-rsid="00242672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color="#000000" loext:opacity="100%" fo:font-size="12pt" fo:font-weight="normal" officeooo:rsid="001b9cc4" officeooo:paragraph-rsid="001b9cc4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color="#000000" loext:opacity="100%" fo:font-size="16pt" fo:font-weight="bold" officeooo:rsid="00242672" officeooo:paragraph-rsid="00242672" style:font-size-asian="16pt" style:font-weight-asian="bold" style:font-size-complex="16pt" style:font-weight-complex="bold"/>
    </style:style>
    <style:style style:name="P63" style:family="paragraph" style:parent-style-name="Standard">
      <style:text-properties fo:color="#000000" loext:opacity="100%" fo:font-size="16pt" fo:font-weight="bold" officeooo:rsid="0028bdb8" officeooo:paragraph-rsid="0028bdb8" style:font-size-asian="16pt" style:font-weight-asian="bold" style:font-size-complex="16pt" style:font-weight-complex="bold"/>
    </style:style>
    <style:style style:name="P64" style:family="paragraph" style:parent-style-name="Standard">
      <style:text-properties fo:color="#000000" loext:opacity="100%" fo:font-size="12pt" fo:font-weight="normal" officeooo:rsid="0028bdb8" officeooo:paragraph-rsid="0028bdb8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color="#000000" loext:opacity="100%" fo:font-size="16pt" fo:font-weight="bold" officeooo:rsid="00365fb5" officeooo:paragraph-rsid="00365fb5" style:font-size-asian="16pt" style:font-weight-asian="bold" style:font-size-complex="16pt" style:font-weight-complex="bold"/>
    </style:style>
    <style:style style:name="P66" style:family="paragraph" style:parent-style-name="Standard">
      <style:text-properties fo:color="#000000" loext:opacity="100%" fo:font-size="12pt" fo:font-weight="normal" officeooo:rsid="00365fb5" officeooo:paragraph-rsid="00365fb5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color="#000000" loext:opacity="100%" fo:font-size="12pt" fo:font-weight="normal" officeooo:rsid="001b9cc4" officeooo:paragraph-rsid="0028bdb8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color="#000000" loext:opacity="100%" fo:font-size="20pt" fo:font-weight="bold" officeooo:rsid="00437383" officeooo:paragraph-rsid="00437383" style:font-size-asian="20pt" style:font-weight-asian="bold" style:font-size-complex="20pt" style:font-weight-complex="bold"/>
    </style:style>
    <style:style style:name="P69" style:family="paragraph" style:parent-style-name="Standard">
      <style:text-properties fo:color="#000000" loext:opacity="100%" fo:font-size="12pt" fo:font-weight="bold" officeooo:rsid="00437383" officeooo:paragraph-rsid="00437383" style:font-size-asian="10.5pt" style:font-weight-asian="bold" style:font-size-complex="12pt" style:font-weight-complex="bold"/>
    </style:style>
    <style:style style:name="P70" style:family="paragraph" style:parent-style-name="Standard">
      <style:text-properties fo:color="#000000" loext:opacity="100%" fo:font-size="12pt" fo:font-weight="normal" officeooo:rsid="00437383" officeooo:paragraph-rsid="00437383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color="#000000" loext:opacity="100%" fo:font-size="12pt" fo:font-weight="normal" officeooo:rsid="00365fb5" officeooo:paragraph-rsid="0037f2f9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color="#000000" loext:opacity="100%" fo:font-size="12pt" fo:font-weight="normal" officeooo:rsid="0037f2f9" officeooo:paragraph-rsid="0037f2f9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color="#000000" loext:opacity="100%" officeooo:rsid="00365fb5" officeooo:paragraph-rsid="0037f2f9"/>
    </style:style>
    <style:style style:name="P74" style:family="paragraph" style:parent-style-name="Standard">
      <style:text-properties officeooo:rsid="000bba56" officeooo:paragraph-rsid="000bba56"/>
    </style:style>
    <style:style style:name="T1" style:family="text">
      <style:text-properties officeooo:rsid="0040f55f"/>
    </style:style>
    <style:style style:name="T2" style:family="text">
      <style:text-properties officeooo:rsid="003e789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c8e24" style:font-weight-asian="bold" style:font-weight-complex="bold"/>
    </style:style>
    <style:style style:name="T6" style:family="text">
      <style:text-properties fo:font-weight="bold" officeooo:rsid="000d0e15" style:font-weight-asian="bold" style:font-weight-complex="bold"/>
    </style:style>
    <style:style style:name="T7" style:family="text">
      <style:text-properties officeooo:rsid="000d0e15"/>
    </style:style>
    <style:style style:name="T8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officeooo:rsid="000f6e9b" style:font-style-asian="italic" style:font-style-complex="italic"/>
    </style:style>
    <style:style style:name="T10" style:family="text">
      <style:text-properties fo:font-size="12pt" fo:font-weight="bold" officeooo:rsid="000d0e15" style:font-size-asian="10.5pt" style:font-weight-asian="bold" style:font-size-complex="12pt" style:font-weight-complex="bold"/>
    </style:style>
    <style:style style:name="T11" style:family="text">
      <style:text-properties fo:font-size="12pt" fo:font-weight="normal" officeooo:rsid="000d0e15" style:font-size-asian="10.5pt" style:font-weight-asian="normal" style:font-size-complex="12pt" style:font-weight-complex="normal"/>
    </style:style>
    <style:style style:name="T12" style:family="text">
      <style:text-properties fo:font-size="12pt" fo:font-weight="bold" officeooo:rsid="000c4e18" style:font-size-asian="10.5pt" style:font-weight-asian="bold" style:font-size-complex="12pt" style:font-weight-complex="bold"/>
    </style:style>
    <style:style style:name="T13" style:family="text">
      <style:text-properties fo:font-size="12pt" fo:font-weight="normal" officeooo:rsid="000c4e18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23e59" style:font-size-asian="10.5pt" style:font-weight-asian="normal" style:font-size-complex="12pt" style:font-weight-complex="normal"/>
    </style:style>
    <style:style style:name="T15" style:family="text">
      <style:text-properties fo:font-size="12pt" fo:font-weight="bold" officeooo:rsid="002de796" style:font-size-asian="10.5pt" style:font-weight-asian="bold" style:font-size-complex="12pt" style:font-weight-complex="bold"/>
    </style:style>
    <style:style style:name="T16" style:family="text">
      <style:text-properties fo:font-size="12pt" fo:font-weight="normal" officeooo:rsid="002de796" style:font-size-asian="10.5pt" style:font-weight-asian="normal" style:font-size-complex="12pt" style:font-weight-complex="normal"/>
    </style:style>
    <style:style style:name="T17" style:family="text">
      <style:text-properties officeooo:rsid="002de796"/>
    </style:style>
    <style:style style:name="T18" style:family="text">
      <style:text-properties officeooo:rsid="000f5f05"/>
    </style:style>
    <style:style style:name="T19" style:family="text">
      <style:text-properties fo:font-style="italic" officeooo:rsid="000f5f05" style:font-style-asian="italic" style:font-style-complex="italic"/>
    </style:style>
    <style:style style:name="T20" style:family="text">
      <style:text-properties officeooo:rsid="00135b80"/>
    </style:style>
    <style:style style:name="T21" style:family="text">
      <style:text-properties officeooo:rsid="002e4b97"/>
    </style:style>
    <style:style style:name="T22" style:family="text">
      <style:text-properties officeooo:rsid="0014a5d9"/>
    </style:style>
    <style:style style:name="T23" style:family="text">
      <style:text-properties fo:color="#000000" loext:opacity="100%" officeooo:rsid="00135b80"/>
    </style:style>
    <style:style style:name="T24" style:family="text">
      <style:text-properties officeooo:rsid="00304248"/>
    </style:style>
    <style:style style:name="T25" style:family="text">
      <style:text-properties officeooo:rsid="00160efb"/>
    </style:style>
    <style:style style:name="T26" style:family="text">
      <style:text-properties officeooo:rsid="002b8445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3beacf"/>
    </style:style>
    <style:style style:name="T29" style:family="text">
      <style:text-properties officeooo:rsid="003d9326"/>
    </style:style>
    <style:style style:name="T30" style:family="text">
      <style:text-properties fo:font-style="italic" officeooo:rsid="003caf7c" style:font-style-asian="italic" style:font-style-complex="italic"/>
    </style:style>
    <style:style style:name="T31" style:family="text">
      <style:text-properties officeooo:rsid="003caf7c"/>
    </style:style>
    <style:style style:name="T32" style:family="text">
      <style:text-properties officeooo:rsid="0036345d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officeooo:rsid="001c3f57"/>
    </style:style>
    <style:style style:name="T35" style:family="text">
      <style:text-properties officeooo:rsid="00272fe8"/>
    </style:style>
    <style:style style:name="T36" style:family="text">
      <style:text-properties fo:font-weight="bold" officeooo:rsid="001c3f57" style:font-weight-asian="bold" style:font-weight-complex="bold"/>
    </style:style>
    <style:style style:name="T37" style:family="text">
      <style:text-properties officeooo:rsid="001936d4"/>
    </style:style>
    <style:style style:name="T38" style:family="text">
      <style:text-properties officeooo:rsid="001b9cc4"/>
    </style:style>
    <style:style style:name="T39" style:family="text">
      <style:text-properties fo:font-weight="bold" officeooo:rsid="001936d4" style:font-weight-asian="bold" style:font-weight-complex="bold"/>
    </style:style>
    <style:style style:name="T40" style:family="text">
      <style:text-properties officeooo:rsid="0019afb3"/>
    </style:style>
    <style:style style:name="T41" style:family="text">
      <style:text-properties officeooo:rsid="003509af"/>
    </style:style>
    <style:style style:name="T42" style:family="text">
      <style:text-properties officeooo:rsid="00353b1f"/>
    </style:style>
    <style:style style:name="T43" style:family="text">
      <style:text-properties fo:font-style="italic" officeooo:rsid="003e7891" style:font-style-asian="italic" style:font-style-complex="italic"/>
    </style:style>
    <style:style style:name="T44" style:family="text">
      <style:text-properties officeooo:rsid="0043b1cf"/>
    </style:style>
    <style:style style:name="T45" style:family="text">
      <style:text-properties officeooo:rsid="0044a098"/>
    </style:style>
    <style:style style:name="T46" style:family="text">
      <style:text-properties fo:font-size="12pt" fo:font-weight="normal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37f2f9" style:font-size-asian="10.5pt" style:font-weight-asian="normal" style:font-size-complex="12pt" style:font-weight-complex="normal"/>
    </style:style>
    <style:style style:name="T48" style:family="text">
      <style:text-properties fo:font-size="12pt" fo:font-weight="bold" officeooo:rsid="0039595f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>SpiritForms 1.0</text:p>
      <text:p text:style-name="P3"/>
      <text:p text:style-name="P3"/>
      <text:p text:style-name="P3"/>
      <text:p text:style-name="P3"/>
      <text:p text:style-name="P3"/>
      <text:p text:style-name="P4">Installation Guide</text:p>
      <text:p text:style-name="P5"><text:span text:style-name="T1">Jan</text:span>. 202<text:span text:style-name="T1">6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" text:anchor-type="char" svg:width="1.3346in" svg:height="1.3346in" draw:z-index="0"><draw:image xlink:href="Pictures/1000000000000258000002582A4566DB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>Requirements:</text:p>
      <text:p text:style-name="P9"/>
      <text:p text:style-name="P9"/>
      <text:p text:style-name="P10">The SpiritForms system can be set up in one of two ways (or both if you wish):</text:p>
      <text:p text:style-name="P10"/>
      <text:p text:style-name="P10">1. On a local computer <text:span text:style-name="T2">(using localhost)</text:span></text:p>
      <text:p text:style-name="P10"/>
      <text:p text:style-name="P10">or</text:p>
      <text:p text:style-name="P10"/>
      <text:p text:style-name="P10">2. In a hosted environment</text:p>
      <text:p text:style-name="P9"/>
      <text:p text:style-name="P9"/>
      <text:p text:style-name="P11">Localhost setup:</text:p>
      <text:p text:style-name="P9"/>
      <text:p text:style-name="P9"/>
      <text:p text:style-name="P12">Hardware:</text:p>
      <text:p text:style-name="P9"/>
      <text:p text:style-name="P13">Computer with sufficient memory and storage. Minimum memory: 16GB Minimum storage = 10GB. Minimum Processor: Intel® Core(TM) i7-3612QM CPU @ 2.10GHz Graphics Card: 2 GB</text:p>
      <text:p text:style-name="P13"/>
      <text:p text:style-name="P9">Software:</text:p>
      <text:p text:style-name="P13"/>
      <text:p text:style-name="P9">1. Windows 10 or later.<text:span text:style-name="T3"/></text:p>
      <text:p text:style-name="P13"/>
      <text:p text:style-name="P10"><text:span text:style-name="T4">2.</text:span> <text:span text:style-name="T5">XAMPP or </text:span><text:span text:style-name="T6">WAMP</text:span><text:span text:style-name="T7"> – Both include Apache web server, MySQL and PHP</text:span></text:p>
      <text:p text:style-name="P13"/>
      <text:p text:style-name="P14"><text:span text:style-name="T4">3.</text:span> <text:a xlink:type="simple" xlink:href="https://dev.mysql.com/downloads/mysql/8.0.html" text:style-name="Internet_20_link" text:visited-style-name="Visited_20_Internet_20_Link"><text:span text:style-name="T4">MySQL 8.0 with MySQL Workbench</text:span></text:a> (<text:span text:style-name="T8">strongly recommended</text:span><text:span text:style-name="T9">)</text:span></text:p>
      <text:p text:style-name="P14"/>
      <text:p text:style-name="P15"><text:span text:style-name="T10">4.</text:span><text:span text:style-name="T11"> </text:span><text:a xlink:type="simple" xlink:href="https://www.nubuilder.com/" text:style-name="Internet_20_link" text:visited-style-name="Visited_20_Internet_20_Link"><text:span text:style-name="T10">nuBuilder</text:span></text:a><text:span text:style-name="T12"> 4.9.2 or later</text:span><text:span text:style-name="T13">. </text:span><text:span text:style-name="T11">See nuBuilder initial </text:span><text:a xlink:type="simple" xlink:href="https://github.com/nuBuilder/nuBuilder" text:style-name="Internet_20_link" text:visited-style-name="Visited_20_Internet_20_Link"><text:span text:style-name="T11">installation instructions here</text:span></text:a><text:span text:style-name="T11">.</text:span></text:p>
      <text:p text:style-name="P16"><text:a xlink:type="simple" xlink:href="https://wiki.nubuilder.cloud/index.php?title=Setup" text:style-name="Internet_20_link" text:visited-style-name="Visited_20_Internet_20_Link">Also see these instructions.</text:a></text:p>
      <text:p text:style-name="P17"/>
      <text:p text:style-name="P9"/>
      <text:p text:style-name="P11">Hosting environment </text:p>
      <text:p text:style-name="P11"/>
      <text:p text:style-name="P10">Any good hosting provider will <text:span text:style-name="T2">suffice</text:span>. </text:p>
      <text:p text:style-name="P9"/>
      <text:p text:style-name="P18">You will need to install:</text:p>
      <text:p text:style-name="P18"/>
      <text:p text:style-name="P19"><text:a xlink:type="simple" xlink:href="https://github.com/nuBuilder/nuBuilder" text:style-name="Internet_20_link" text:visited-style-name="Visited_20_Internet_20_Link">nuBuilder</text:a> 4.9.2 or later <text:span text:style-name="T2">(also FREE!)</text:span></text:p>
      <text:p text:style-name="P19"/>
      <text:p text:style-name="P20">See nuBuilder <text:span text:style-name="T2">download and </text:span><text:a xlink:type="simple" xlink:href="https://github.com/nuBuilder/nuBuilder" text:style-name="Internet_20_link" text:visited-style-name="Visited_20_Internet_20_Link">installation instructions here</text:a>. <text:a xlink:type="simple" xlink:href="https://wiki.nubuilder.cloud/index.php?title=Setup" text:style-name="Internet_20_link" text:visited-style-name="Visited_20_Internet_20_Link"><text:span text:style-name="T14">Also see these instructions.</text:span></text:a></text:p>
      <text:p text:style-name="P21"/>
      <text:p text:style-name="P22"/>
      <text:p text:style-name="P23"><text:span text:style-name="T15">Note:</text:span><text:span text:style-name="T16"> Before importing an existing database to your hosting server, you may have to do a search/replace regarding collation (for example, </text:span>search for ‘utf8mb4_0900_ai_ci’ and replace it <text:span text:style-name="T17">with ‘</text:span>utf8mb4_general_ci’<text:span text:style-name="T17">) before your database properly imports.</text:span></text:p>
      <text:p text:style-name="P23"/>
      <text:p text:style-name="P24"><text:soft-page-break/></text:p>
      <text:p text:style-name="P25"><text:span text:style-name="T18">The remainder of the installation instructions assume a </text:span><text:span text:style-name="T19">localhost </text:span><text:span text:style-name="T18">environment. You can adapt them for your hosting provider setup as required.</text:span></text:p>
      <text:p text:style-name="P26"/>
      <text:p text:style-name="P26">Assuming that you have <text:span text:style-name="T20">created your new database </text:span><text:span text:style-name="T21">and that you have installed nuBuilder and connected to the database</text:span><text:span text:style-name="T20">, </text:span><text:span text:style-name="T22">n</text:span><text:span text:style-name="T23">ow you can import the SpiritForms application into the database. </text:span></text:p>
      <text:p text:style-name="P27"/>
      <text:p text:style-name="P28">The following instructions assume that you have MySQL Workbench available to you. If you don’t have MySQL Workbench, then the process will most likely be somewhat similar with another tool.</text:p>
      <text:p text:style-name="P27"/>
      <text:p text:style-name="P29">1. Log in to MySQL Workbench</text:p>
      <text:p text:style-name="P27"/>
      <text:p text:style-name="P27">2. DROP the tables in the database. Yes, all of them.</text:p>
      <text:p text:style-name="P30"/>
      <text:p text:style-name="P30"><text:span text:style-name="T21">3</text:span>. Go to <text:span text:style-name="T4">Server</text:span> <text:s/>&gt; <text:span text:style-name="T4">Data Import</text:span></text:p>
      <text:p text:style-name="P30"/>
      <text:p text:style-name="P30"><text:span text:style-name="T21">4</text:span>. Click the ‘<text:span text:style-name="T4">Import from Self-Contained File</text:span>’ radio button</text:p>
      <text:p text:style-name="P30"/>
      <text:p text:style-name="P30"><text:span text:style-name="T21">5</text:span>. To the far right, click the … and navigate to the <text:span text:style-name="T24">SpiritForms </text:span>nuBuilder .sql file you downloaded.</text:p>
      <text:p text:style-name="P30">The file name will be:</text:p>
      <text:p text:style-name="P30">YYYY-MM--DD_101632_6941a2008fb72_nuBuilder_backup.sql</text:p>
      <text:p text:style-name="P30">or something similar.</text:p>
      <text:p text:style-name="P30"/>
      <text:p text:style-name="P30"><text:span text:style-name="T21">6</text:span>. In the Default Target Schema drop-down, select your database/schema name.</text:p>
      <text:p text:style-name="P30"/>
      <text:p text:style-name="P30"><text:span text:style-name="T21">7</text:span>. Click the ‘Start Import’ button in the lower right.</text:p>
      <text:p text:style-name="P30"/>
      <text:p text:style-name="P30">The database tables will be created. Once the import is finished, click the tiny <text:s/></text:p>
      <text:p text:style-name="P31"><draw:frame draw:style-name="fr2" draw:name="Image2" text:anchor-type="char" svg:x="0.0929in" svg:y="0.0583in" svg:width="0.4791in" svg:height="0.3902in" draw:z-index="1"><draw:image xlink:href="Pictures/100000010000001B0000001623300273.png" xlink:type="simple" xlink:show="embed" xlink:actuate="onLoad" draw:mime-type="image/png"/></draw:frame></text:p>
      <text:p text:style-name="P31"/>
      <text:p text:style-name="P32"/>
      <text:p text:style-name="P33">button at the top of the navigator window.</text:p>
      <text:p text:style-name="P33"/>
      <text:p text:style-name="P33">You should now see all of the SpiritForms and nuBuilder <text:span text:style-name="T25">system </text:span>tables and columns.</text:p>
      <text:p text:style-name="P33"/>
      <text:p text:style-name="P34"><text:span text:style-name="T21">8</text:span>. Close out of MySQL Workbench.</text:p>
      <text:p text:style-name="P34"/>
      <text:p text:style-name="P34"/>
      <text:p text:style-name="P34"/>
      <text:p text:style-name="P35">Create an uploads folder on the server</text:p>
      <text:p text:style-name="P34"/>
      <text:p text:style-name="P36"><text:span text:style-name="T21">9. </text:span>At <text:span text:style-name="T26">the</text:span> document root of your server, create a folder called uploads.</text:p>
      <text:p text:style-name="P36"/>
      <text:p text:style-name="P36">Example: <text:s/>C:\xampp\htdocs\uploads</text:p>
      <text:p text:style-name="P36"/>
      <text:p text:style-name="P37">This is required for SpiritForms file uploads.</text:p>
      <text:p text:style-name="P37"/>
      <text:p text:style-name="P38"/>
      <text:p text:style-name="P39"><text:soft-page-break/>10. Under the Uploads folder, create two more folders: /Evidence and /History. These two folders will hold <text:span text:style-name="T27">multimedia files for the Report Templates</text:span>. <text:s/><text:span text:style-name="T28">These folders are</text:span> for maintaining the <text:span text:style-name="T29">Report </text:span>templates <text:span text:style-name="T30">only</text:span><text:span text:style-name="T31">. </text:span></text:p>
      <text:p text:style-name="P39"/>
      <text:p text:style-name="P38">REQUIRED: Web Root Alias for /uploads</text:p>
      <text:p text:style-name="P37"/>
      <text:p text:style-name="P40">SpiritForms (built on nuBuilder Forte 4.9.2) requires the /uploads directory to be accessible from the web root.</text:p>
      <text:p text:style-name="P40"/>
      <text:p text:style-name="P40">This is not optional.</text:p>
      <text:p text:style-name="P40"/>
      <text:p text:style-name="P40">nuBuilder automatically normalizes &lt;img src&gt; paths to relative URLs when saving HTML content (e.g., Report Templates, Notes, WYSIWYG content).</text:p>
      <text:p text:style-name="P40">If /uploads is not globally reachable, image links will break after saving.</text:p>
      <text:p text:style-name="P40"/>
      <text:p text:style-name="P40">Why this is required:</text:p>
      <text:p text:style-name="P40"/>
      <text:p text:style-name="P40">nuBuilder rewrites image paths on save like this:</text:p>
      <text:p text:style-name="P40"/>
      <text:p text:style-name="P40">/uploads/... <text:s/>→ <text:s/>../uploads/...</text:p>
      <text:p text:style-name="P40"/>
      <text:p text:style-name="P40">This behavior applies only to &lt;img&gt; elements</text:p>
      <text:p text:style-name="P40"/>
      <text:p text:style-name="P40">Audio, video, and anchor links are not rewritten</text:p>
      <text:p text:style-name="P40"/>
      <text:p text:style-name="P40">nuBuilder assumes /uploads exists at the web root</text:p>
      <text:p text:style-name="P40"/>
      <text:p text:style-name="P40">Therefore, /uploads must resolve correctly regardless of form depth or URL context.</text:p>
      <text:p text:style-name="P40"/>
      <text:p text:style-name="P37">Apache (Recommended)</text:p>
      <text:p text:style-name="P40"/>
      <text:p text:style-name="P40">Add the following to your Apache configuration</text:p>
      <text:p text:style-name="P40">(e.g., httpd.conf or httpd-vhosts.conf):</text:p>
      <text:p text:style-name="P40"/>
      <text:p text:style-name="P40">Alias /uploads "C:/your-web-root/SpiritForms/uploads"</text:p>
      <text:p text:style-name="P40"/>
      <text:p text:style-name="P40">&lt;Directory "C:/your-web-root/SpiritForms/uploads"&gt;</text:p>
      <text:p text:style-name="P40"><text:s text:c="4"/>AllowOverride All</text:p>
      <text:p text:style-name="P40"><text:s text:c="4"/>Require all granted</text:p>
      <text:p text:style-name="P40">&lt;/Directory&gt;</text:p>
      <text:p text:style-name="P40"/>
      <text:p text:style-name="P40">Restart Apache after saving changes.</text:p>
      <text:p text:style-name="P40"/>
      <text:p text:style-name="P37">Linux / Production Example</text:p>
      <text:p text:style-name="P40">Alias /uploads "/var/www/SpiritForms/uploads"</text:p>
      <text:p text:style-name="P40"/>
      <text:p text:style-name="P40">&lt;Directory "/var/www/SpiritForms/uploads"&gt;</text:p>
      <text:p text:style-name="P40"><text:s text:c="4"/>AllowOverride All</text:p>
      <text:p text:style-name="P40"><text:s text:c="4"/>Require all granted</text:p>
      <text:p text:style-name="P40"><text:soft-page-break/>&lt;/Directory&gt;</text:p>
      <text:p text:style-name="P40"/>
      <text:p text:style-name="P40">Verification Step (Required)</text:p>
      <text:p text:style-name="P40"/>
      <text:p text:style-name="P40">After installation, confirm that the following URL loads a file correctly:</text:p>
      <text:p text:style-name="P40"/>
      <text:p text:style-name="P40">http://yourdomain.com/uploads/</text:p>
      <text:p text:style-name="P40"/>
      <text:p text:style-name="P40">If this URL does not resolve, image rendering inside SpiritForms WYSIWYG editors will fail after saving.</text:p>
      <text:p text:style-name="P40"/>
      <text:p text:style-name="P40">Important Notes</text:p>
      <text:p text:style-name="P40"/>
      <text:p text:style-name="P40">Do not remove or disable this alias</text:p>
      <text:p text:style-name="P40"/>
      <text:p text:style-name="P40">Do not attempt to “fix” image paths in PHP or JavaScript</text:p>
      <text:p text:style-name="P40"/>
      <text:p text:style-name="P40">Do not rely on relative paths inside HTML content</text:p>
      <text:p text:style-name="P40"/>
      <text:p text:style-name="P40">This alias ensures:</text:p>
      <text:p text:style-name="P40"/>
      <text:p text:style-name="P40">Image stability in Report Templates</text:p>
      <text:p text:style-name="P40"/>
      <text:p text:style-name="P40">Correct rendering in Notes</text:p>
      <text:p text:style-name="P40"/>
      <text:p text:style-name="P40">Proper display in printed reports</text:p>
      <text:p text:style-name="P40"/>
      <text:p text:style-name="P40">Forward compatibility with nuBuilder updates</text:p>
      <text:p text:style-name="P37"/>
      <text:p text:style-name="P41"><text:span text:style-name="Strong_20_Emphasis"><text:span text:style-name="T32">NOTE: </text:span></text:span><text:span text:style-name="Strong_20_Emphasis">Shared Hosting Limitation</text:span><text:line-break/><text:span text:style-name="T33">On shared hosting platforms where Apache virtual host access is restricted, the required </text:span><text:span text:style-name="Source_20_Text"><text:span text:style-name="T33">/uploads</text:span></text:span><text:span text:style-name="T33"> alias cannot be created. In these environments, image paths rewritten by nuBuilder may not resolve correctly after saving WYSIWYG content. This is a known limitation of the hosting environment, not of SpiritForms itself. </text:span></text:p>
      <text:p text:style-name="P42"/>
      <text:p text:style-name="P42"/>
      <text:p text:style-name="P43"/>
      <text:p text:style-name="P43">Enable .zip files in php.ini</text:p>
      <text:p text:style-name="P44"/>
      <text:p text:style-name="P44">SpiritForms needs access to .zip file upload/download functionality in Tiny File Manager.</text:p>
      <text:p text:style-name="P44">To enable that, we need to enable ZipArchive in php.ini.</text:p>
      <text:p text:style-name="P44">In your file system, find your <text:span text:style-name="T4">php.ini</text:span> file and <text:span text:style-name="T4">uncomment the following line:</text:span></text:p>
      <text:p text:style-name="P44"/>
      <text:p text:style-name="P44">‘extension=zip'</text:p>
      <text:p text:style-name="P34"/>
      <text:p text:style-name="P45">Without doing this, SpiritForms uploads/download of .zip files will not work.</text:p>
      <text:p text:style-name="P45"/>
      <text:p text:style-name="P46"><text:soft-page-break/>Add two lines of code to nuconfig.php</text:p>
      <text:p text:style-name="P47"/>
      <text:p text:style-name="P47">You should have already modified nuconfig.php to connect SpiritForms to your database.</text:p>
      <text:p text:style-name="P47">The file is located here:</text:p>
      <text:p text:style-name="P47"/>
      <text:p text:style-name="P47">C:\xampp\htdocs\your_nuBuilder_folder\nuconfig.php</text:p>
      <text:p text:style-name="P47"/>
      <text:p text:style-name="P47">Now we need to modify it to add two important lines of code.</text:p>
      <text:p text:style-name="P47"/>
      <text:p text:style-name="P47">Inside that file, find:</text:p>
      <text:p text:style-name="P47"/>
      <text:p text:style-name="P47">// Settings<text:line-break/><text:line-break/>$nuConfigSettingsFromDB = true; <text:s/>//-- Use settings from setup-&gt;settings if set to true (default)</text:p>
      <text:p text:style-name="P47"/>
      <text:p text:style-name="P47">Immediately below that ADD these two lines:</text:p>
      <text:p text:style-name="P47"/>
      <text:p text:style-name="P48">$nuUploadsRoot = rtrim($_SERVER['DOCUMENT_ROOT'], '/\\') . '/uploads'; <text:s/>//-- Defines document upload root folder<text:line-break/>$nuUploadsUrl = '/uploads';</text:p>
      <text:p text:style-name="P47"/>
      <text:p text:style-name="P47">The entire block of code should now be:</text:p>
      <text:p text:style-name="P47"/>
      <text:p text:style-name="P47">// Settings<text:line-break/><text:line-break/>$nuConfigSettingsFromDB = true;<text:tab/>//-- Use settings from setup-&gt;settings if set to true (default)<text:line-break/>$nuUploadsRoot = rtrim($_SERVER['DOCUMENT_ROOT'], '/\\') . '/uploads'; <text:s text:c="4"/>//-- Defines document upload root folder<text:line-break/>$nuUploadsUrl = '/uploads';</text:p>
      <text:p text:style-name="P47"/>
      <text:p text:style-name="P47"/>
      <text:p text:style-name="P47">Save the file.</text:p>
      <text:p text:style-name="P49"/>
      <text:p text:style-name="P49"/>
      <text:p text:style-name="P34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Custom <text:span text:style-name="T34">SpiritForms </text:span>Files Placement - ***IMPORTANT***</text:p>
      <text:p text:style-name="P50"/>
      <text:p text:style-name="P51"><text:span text:style-name="T35">Two</text:span> custom .php files were included in the zip file that you downloaded. They should be in a separate folder named <text:span text:style-name="T4">Custom </text:span><text:span text:style-name="T36">SpiritForms </text:span><text:span text:style-name="T4">Files</text:span> within the .zip file.</text:p>
      <text:p text:style-name="P51"/>
      <text:p text:style-name="P52">1. <text:span text:style-name="T4">get_note.php</text:span> – required for selecting Report templates <text:span text:style-name="T37">in SpiritForms</text:span></text:p>
      <text:p text:style-name="P52">To install this file, create a new folder called /custom on the server with a path as follows:</text:p>
      <text:p text:style-name="P52"/>
      <text:p text:style-name="P53"><text:span text:style-name="T38">C:\xampp\htdocs\your_nuBuilder_folder\</text:span>your_nuBuilder_folder<text:span text:style-name="T38">\</text:span>custom</text:p>
      <text:p text:style-name="P53"/>
      <text:p text:style-name="P52">and place the file there.</text:p>
      <text:p text:style-name="P52"/>
      <text:p text:style-name="P52">2. <text:span text:style-name="T39">get_user_email.php</text:span><text:span text:style-name="T37"> – required for selecting email recipients in SpiritForms</text:span></text:p>
      <text:p text:style-name="P54">Place this file in the same directory as in step 1 above.</text:p>
      <text:p text:style-name="P54"/>
      <text:p text:style-name="P55"/>
      <text:p text:style-name="P55"/>
      <text:p text:style-name="P56">Custom<text:span text:style-name="T40">ized nuBuilder </text:span><text:s/>Files Placement - ***IMPORTANT***</text:p>
      <text:p text:style-name="P57"/>
      <text:p text:style-name="P58">There are <text:span text:style-name="T35">three</text:span> nuBuilder system files that have been customized. These files must replace existing nuBuilder files. <text:span text:style-name="T27">It is strongly recommended that you make backup copies of the original files before replacing them. </text:span></text:p>
      <text:p text:style-name="P58"/>
      <text:p text:style-name="P58">You will find the customized files in a folder called:</text:p>
      <text:p text:style-name="P59">Customized nuBuilder Files</text:p>
      <text:p text:style-name="P60">They will be in a sub folder called ‘core’ in the zip file. This is a reminder that these are nuBuilder core files. They are:</text:p>
      <text:p text:style-name="P60"/>
      <text:p text:style-name="P60">nuace.php</text:p>
      <text:p text:style-name="P60">nuform.js</text:p>
      <text:p text:style-name="P60">nurunhtml.php</text:p>
      <text:p text:style-name="P60"/>
      <text:p text:style-name="P60">Place them in this location:</text:p>
      <text:p text:style-name="P60"/>
      <text:p text:style-name="P60">C:\xampp\htdocs\your_nuBuilder_folder\core</text:p>
      <text:p text:style-name="P61"/>
      <text:p text:style-name="P61"/>
      <text:p text:style-name="P62"/>
      <text:p text:style-name="P62">Tiny File Manager custom file</text:p>
      <text:p text:style-name="P61"/>
      <text:p text:style-name="P61"/>
      <text:p text:style-name="P61">1. Tiny File Manager ‘<text:span text:style-name="T4">config.php</text:span>’</text:p>
      <text:p text:style-name="P61">Put this file in this folder:</text:p>
      <text:p text:style-name="P61"/>
      <text:p text:style-name="P61">C:\xampp\htdocs\your_nuBuilder_folder\third_party\tinyfilemanager\config.php</text:p>
      <text:p text:style-name="P61"/>
      <text:p text:style-name="P61"/>
      <text:p text:style-name="P61"><text:soft-page-break/></text:p>
      <text:p text:style-name="P63">SpiritForms ‘Capture Page Chrome Extension</text:p>
      <text:p text:style-name="P63"/>
      <text:p text:style-name="P64">You will find a separate .zip file called ‘CapturePageChromeExtension.zip’ in the download.</text:p>
      <text:p text:style-name="P64">This custom Chrome extension is required for <text:span text:style-name="T41">you and </text:span>your clients to be able to capture and download SpiritForms Reports. Separate installation instructions are included within the .zip file. <text:span text:style-name="T42">Please read and follow those instructions. </text:span><text:span text:style-name="T2">Note: This Chrome extension is </text:span><text:span text:style-name="T43">not</text:span><text:span text:style-name="T2"> required to </text:span><text:span text:style-name="T43">view</text:span><text:span text:style-name="T2"> reports.</text:span></text:p>
      <text:p text:style-name="P64"/>
      <text:p text:style-name="P64"/>
      <text:p text:style-name="P64"/>
      <text:p text:style-name="P64"/>
      <text:p text:style-name="P65">Email Setup</text:p>
      <text:p text:style-name="P65"/>
      <text:p text:style-name="P66">1. Log in to SpiritFormss as globeadmin</text:p>
      <text:p text:style-name="P66">2. Click ‘Setup’</text:p>
      <text:p text:style-name="P66"/>
      <text:p text:style-name="P66"><draw:frame draw:style-name="fr3" draw:name="Image3" text:anchor-type="char" svg:width="6.9252in" svg:height="3.5193in" draw:z-index="2"><draw:image xlink:href="Pictures/10000001000004830000024B4DFAED95.png" xlink:type="simple" xlink:show="embed" xlink:actuate="onLoad" draw:mime-type="image/png"/></draw:frame></text:p>
      <text:p text:style-name="P67"/>
      <text:p text:style-name="P66">3. Click the ‘Email’ tab.</text:p>
      <text:p text:style-name="P66"/>
      <text:p text:style-name="P66"><draw:frame draw:style-name="fr1" draw:name="Image4" text:anchor-type="char" svg:width="5.9563in" svg:height="2.5146in" draw:z-index="3"><draw:image xlink:href="Pictures/10000001000002E300000138F45675FB.png" xlink:type="simple" xlink:show="embed" xlink:actuate="onLoad" draw:mime-type="image/png"/></draw:frame><text:soft-page-break/></text:p>
      <text:p text:style-name="P66"/>
      <text:p text:style-name="P68"/>
      <text:p text:style-name="P68">Login Page Customization</text:p>
      <text:p text:style-name="P69"/>
      <text:p text:style-name="P70">The server administrator can easily customize the application Login page by editing the nuconfig.php file.</text:p>
      <text:p text:style-name="P70"/>
      <text:p text:style-name="P70">1. Open nuconfig.php in notepad or notepad++.</text:p>
      <text:p text:style-name="P70"/>
      <text:p text:style-name="P70">2. Go to line 110. There you will see a comment as follows:</text:p>
      <text:p text:style-name="P70"/>
      <text:p text:style-name="P70">// Alternatively, uncomment this block to customize the whole login form (note: $nuConfigLogonMode will be ignored):</text:p>
      <text:p text:style-name="P70"/>
      <text:p text:style-name="P70">Make your custom edits in the code below this line <text:span text:style-name="T44">to customize </text:span><text:span text:style-name="T45">the</text:span><text:span text:style-name="T44"> login page.</text:span></text:p>
      <text:p text:style-name="P70"/>
      <text:p text:style-name="P70"/>
      <text:p text:style-name="P70"/>
      <text:p text:style-name="P70"/>
      <text:p text:style-name="P70"/>
      <text:p text:style-name="P66"><draw:frame draw:style-name="fr3" draw:name="Image5" text:anchor-type="char" svg:width="6.9252in" svg:height="6.7535in" draw:z-index="4"><draw:image xlink:href="Pictures/10000001000002DA000002C8E87E7358.png" xlink:type="simple" xlink:show="embed" xlink:actuate="onLoad" draw:mime-type="image/png"/></draw:frame><text:soft-page-break/></text:p>
      <text:p text:style-name="P66"/>
      <text:p text:style-name="P66"/>
      <text:p text:style-name="P71">4. Enter the required information.</text:p>
      <text:p text:style-name="P72">5. Click the ‘Test Email’ button to verify that the email setup is successful.</text:p>
      <text:p text:style-name="P71"/>
      <text:p text:style-name="P73"><text:span text:style-name="T46">This email account will be the ‘Inbox’ for all Client email replies. The </text:span><text:span text:style-name="T47">emails in this account will be used to populate the </text:span><text:span text:style-name="T48">Emails From The Client</text:span><text:span text:style-name="T47"> field for each investigation record.</text:span></text:p>
      <text:p text:style-name="P33"/>
      <text:p text:style-name="P26"/>
      <text:p text:style-name="P26"/>
      <text:p text:style-name="P74"/>
      <text:p text:style-name="P7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5T17:53:49.639689600</meta:creation-date>
    <meta:editing-duration>P0D</meta:editing-duration>
    <meta:editing-cycles>1</meta:editing-cycles>
    <meta:generator>LibreOffice/25.8.5.2$Windows_X86_64 LibreOffice_project/9c8b85f387cc00a89945a79c9e6239f32e450ac2</meta:generator>
    <meta:document-statistic meta:table-count="0" meta:image-count="5" meta:object-count="0" meta:page-count="10" meta:paragraph-count="142" meta:word-count="1282" meta:character-count="8659" meta:non-whitespace-character-count="7479"/>
  </office:meta>
</office:document-meta>
</file>